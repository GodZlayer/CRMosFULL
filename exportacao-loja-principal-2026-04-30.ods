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meta="urn:oasis:names:tc:opendocument:xmlns:meta:1.0" office:version="1.2">
  <office:scripts/>
  <office:automatic-styles/>
  <office:body>
    <office:spreadsheet>
      <table:table table:name="Resumo">
        <table:table-row>
          <table:table-cell office:value-type="string">
            <text:p>campo</text:p>
          </table:table-cell>
          <table:table-cell office:value-type="string">
            <text:p>valor</text:p>
          </table:table-cell>
        </table:table-row>
        <table:table-row>
          <table:table-cell office:value-type="string">
            <text:p>Exportado em</text:p>
          </table:table-cell>
          <table:table-cell office:value-type="string">
            <text:p>2026-04-30T16:06:19.417-03:00</text:p>
          </table:table-cell>
        </table:table-row>
        <table:table-row>
          <table:table-cell office:value-type="string">
            <text:p>Loja</text:p>
          </table:table-cell>
          <table:table-cell office:value-type="string">
            <text:p>Loja Principal</text:p>
          </table:table-cell>
        </table:table-row>
        <table:table-row>
          <table:table-cell office:value-type="string">
            <text:p>Codigo da loja</text:p>
          </table:table-cell>
          <table:table-cell office:value-type="string">
            <text:p>BRASIL_EXPRESS_MATRIZ</text:p>
          </table:table-cell>
        </table:table-row>
        <table:table-row>
          <table:table-cell office:value-type="string">
            <text:p>Contas de caixa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Movimentos de caixa</text:p>
          </table:table-cell>
          <table:table-cell office:value-type="float" office:value="70">
            <text:p>70</text:p>
          </table:table-cell>
        </table:table-row>
        <table:table-row>
          <table:table-cell office:value-type="string">
            <text:p>Lancamentos financeiros</text:p>
          </table:table-cell>
          <table:table-cell office:value-type="float" office:value="58">
            <text:p>58</text:p>
          </table:table-cell>
        </table:table-row>
        <table:table-row>
          <table:table-cell office:value-type="string">
            <text:p>Itens de estoque</text:p>
          </table:table-cell>
          <table:table-cell office:value-type="float" office:value="206">
            <text:p>206</text:p>
          </table:table-cell>
        </table:table-row>
        <table:table-row>
          <table:table-cell office:value-type="string">
            <text:p>Reposicoes de estoque</text:p>
          </table:table-cell>
          <table:table-cell office:value-type="float" office:value="216">
            <text:p>216</text:p>
          </table:table-cell>
        </table:table-row>
        <table:table-row>
          <table:table-cell office:value-type="string">
            <text:p>Ordens de servico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Itens de O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liente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Vendas PDV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Itens PDV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Pagamentos PDV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Linhas importadas do legado</text:p>
          </table:table-cell>
          <table:table-cell office:value-type="float" office:value="0">
            <text:p>0</text:p>
          </table:table-cell>
        </table:table-row>
      </table:table>
      <table:table table:name="Saldos Caixa">
        <table:table-row>
          <table:table-cell office:value-type="string">
            <text:p>id</text:p>
          </table:table-cell>
          <table:table-cell office:value-type="string">
            <text:p>codigo</text:p>
          </table:table-cell>
          <table:table-cell office:value-type="string">
            <text:p>nome</text:p>
          </table:table-cell>
          <table:table-cell office:value-type="string">
            <text:p>saldo_inicial</text:p>
          </table:table-cell>
          <table:table-cell office:value-type="string">
            <text:p>saldo_atual</text:p>
          </table:table-cell>
          <table:table-cell office:value-type="string">
            <text:p>ativo</text:p>
          </table:table-cell>
          <table:table-cell office:value-type="string">
            <text:p>total_movimentos</text:p>
          </table:table-cell>
          <table:table-cell office:value-type="string">
            <text:p>ultimo_movimento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 office:value-type="float" office:value="209">
            <text:p>209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2026-04-29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 office:value-type="float" office:value="6387.9">
            <text:p>6387.9</text:p>
          </table:table-cell>
          <table:table-cell office:value-type="float" office:value="3509.22">
            <text:p>3509.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2026-04-27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float" office:value="33414.57">
            <text:p>33414.57</text:p>
          </table:table-cell>
          <table:table-cell office:value-type="float" office:value="46416.75">
            <text:p>46416.7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2026-04-3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R_COM_DENIO</text:p>
          </table:table-cell>
          <table:table-cell office:value-type="string">
            <text:p>R$ com Denio</text:p>
          </table:table-cell>
          <table:table-cell office:value-type="float" office:value="1662">
            <text:p>1662</text:p>
          </table:table-cell>
          <table:table-cell office:value-type="float" office:value="892">
            <text:p>8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26-04-27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OUTROS_REGINA</text:p>
          </table:table-cell>
          <table:table-cell office:value-type="string">
            <text:p>outros Regina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26-04-27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 office:value-type="float" office:value="0">
            <text:p>0</text:p>
          </table:table-cell>
          <table:table-cell office:value-type="float" office:value="2.842170943040401e-14">
            <text:p>2.842170943040401e-1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2026-04-27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RTHUR</text:p>
          </table:table-cell>
          <table:table-cell office:value-type="string">
            <text:p>Arthur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26-04-2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OUTROS</text:p>
          </table:table-cell>
          <table:table-cell office:value-type="string">
            <text:p>Outro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Movimentos Caixa">
        <table:table-row>
          <table:table-cell office:value-type="string">
            <text:p>id</text:p>
          </table:table-cell>
          <table:table-cell office:value-type="string">
            <text:p>data_movimento</text:p>
          </table:table-cell>
          <table:table-cell office:value-type="string">
            <text:p>tipo_lancamento</text:p>
          </table:table-cell>
          <table:table-cell office:value-type="string">
            <text:p>tipo_movimento</text:p>
          </table:table-cell>
          <table:table-cell office:value-type="string">
            <text:p>descricao</text:p>
          </table:table-cell>
          <table:table-cell office:value-type="string">
            <text:p>valor</text:p>
          </table:table-cell>
          <table:table-cell office:value-type="string">
            <text:p>conta_caixa_id</text:p>
          </table:table-cell>
          <table:table-cell office:value-type="string">
            <text:p>conta_caixa_codigo</text:p>
          </table:table-cell>
          <table:table-cell office:value-type="string">
            <text:p>conta_caixa_nome</text:p>
          </table:table-cell>
          <table:table-cell office:value-type="string">
            <text:p>categoria_financeira</text:p>
          </table:table-cell>
          <table:table-cell office:value-type="string">
            <text:p>forma_pagamento</text:p>
          </table:table-cell>
          <table:table-cell office:value-type="string">
            <text:p>venda_pdv_codigo</text:p>
          </table:table-cell>
          <table:table-cell office:value-type="string">
            <text:p>workbook_origem</text:p>
          </table:table-cell>
          <table:table-cell office:value-type="string">
            <text:p>aba_origem</text:p>
          </table:table-cell>
          <table:table-cell office:value-type="string">
            <text:p>linha_origem</text:p>
          </table:table-cell>
          <table:table-cell office:value-type="string">
            <text:p>secao_legada</text:p>
          </table:table-cell>
          <table:table-cell office:value-type="string">
            <text:p>payload_brut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26-04-30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30-0002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30-0002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serviço"}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026-04-30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30-0001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30-0001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serviço"}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026-04-29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9-0002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29-0002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serviço"}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2026-04-29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Compra cola de madeira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 office:value-type="string">
            <text:p>Compra de produto</text:p>
          </table:table-cell>
          <table:table-cell office:value-type="string">
            <text:p>NAO_DEFINIDO</text:p>
          </table:table-cell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}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2026-04-29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9-0001</text:p>
          </table:table-cell>
          <table:table-cell office:value-type="float" office:value="7.5">
            <text:p>7.5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29-0001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serviço"}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IN</text:p>
          </table:table-cell>
          <table:table-cell office:value-type="string">
            <text:p>Transferencia de boletos</text:p>
          </table:table-cell>
          <table:table-cell office:value-type="float" office:value="-573.1">
            <text:p>-573.1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6210b2cf-d848-48ce-a156-f8052d9639ed","fromCashAccountId":10,"fromCashAccountCode":"BOLETOS","fromCashAccountName":"boletos","toCashAccountId":7,"toCashAccountCode":"MAQ_AMARELA_PIX_CEL","toCashAccountName":"Maq Amarela/pix cel","amount":-573.1,"movementDate":"2026-04-27","notes":"","direction":"IN"}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OUT</text:p>
          </table:table-cell>
          <table:table-cell office:value-type="string">
            <text:p>Transferencia para Maq Amarela/pix cel</text:p>
          </table:table-cell>
          <table:table-cell office:value-type="float" office:value="-573.1">
            <text:p>-573.1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6210b2cf-d848-48ce-a156-f8052d9639ed","fromCashAccountId":10,"fromCashAccountCode":"BOLETOS","fromCashAccountName":"boletos","toCashAccountId":7,"toCashAccountCode":"MAQ_AMARELA_PIX_CEL","toCashAccountName":"Maq Amarela/pix cel","amount":-573.1,"movementDate":"2026-04-27","notes":"","direction":"OUT"}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IN</text:p>
          </table:table-cell>
          <table:table-cell office:value-type="string">
            <text:p>Transferencia de Arthur</text:p>
          </table:table-cell>
          <table:table-cell office:value-type="float" office:value="804">
            <text:p>804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8c577d8a-5c8d-4490-bf46-fd94a1c49822","fromCashAccountId":11,"fromCashAccountCode":"ARTHUR","fromCashAccountName":"Arthur","toCashAccountId":7,"toCashAccountCode":"MAQ_AMARELA_PIX_CEL","toCashAccountName":"Maq Amarela/pix cel","amount":804,"movementDate":"2026-04-27","notes":"","direction":"IN"}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OUT</text:p>
          </table:table-cell>
          <table:table-cell office:value-type="string">
            <text:p>Transferencia para Maq Amarela/pix cel</text:p>
          </table:table-cell>
          <table:table-cell office:value-type="float" office:value="804">
            <text:p>804</text:p>
          </table:table-cell>
          <table:table-cell office:value-type="float" office:value="11">
            <text:p>11</text:p>
          </table:table-cell>
          <table:table-cell office:value-type="string">
            <text:p>ARTHUR</text:p>
          </table:table-cell>
          <table:table-cell office:value-type="string">
            <text:p>Arthur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8c577d8a-5c8d-4490-bf46-fd94a1c49822","fromCashAccountId":11,"fromCashAccountCode":"ARTHUR","fromCashAccountName":"Arthur","toCashAccountId":7,"toCashAccountCode":"MAQ_AMARELA_PIX_CEL","toCashAccountName":"Maq Amarela/pix cel","amount":804,"movementDate":"2026-04-27","notes":"","direction":"OUT"}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IN</text:p>
          </table:table-cell>
          <table:table-cell office:value-type="string">
            <text:p>Transferencia de outros Regina</text:p>
          </table:table-cell>
          <table:table-cell office:value-type="float" office:value="1060">
            <text:p>106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fc97d896-848d-42fa-961f-2f39362fd5b6","fromCashAccountId":9,"fromCashAccountCode":"OUTROS_REGINA","fromCashAccountName":"outros Regina","toCashAccountId":7,"toCashAccountCode":"MAQ_AMARELA_PIX_CEL","toCashAccountName":"Maq Amarela/pix cel","amount":1060,"movementDate":"2026-04-27","notes":"","direction":"IN"}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OUT</text:p>
          </table:table-cell>
          <table:table-cell office:value-type="string">
            <text:p>Transferencia para Maq Amarela/pix cel</text:p>
          </table:table-cell>
          <table:table-cell office:value-type="float" office:value="1060">
            <text:p>1060</text:p>
          </table:table-cell>
          <table:table-cell office:value-type="float" office:value="9">
            <text:p>9</text:p>
          </table:table-cell>
          <table:table-cell office:value-type="string">
            <text:p>OUTROS_REGINA</text:p>
          </table:table-cell>
          <table:table-cell office:value-type="string">
            <text:p>outros Regina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fc97d896-848d-42fa-961f-2f39362fd5b6","fromCashAccountId":9,"fromCashAccountCode":"OUTROS_REGINA","fromCashAccountName":"outros Regina","toCashAccountId":7,"toCashAccountCode":"MAQ_AMARELA_PIX_CEL","toCashAccountName":"Maq Amarela/pix cel","amount":1060,"movementDate":"2026-04-27","notes":"","direction":"OUT"}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IN</text:p>
          </table:table-cell>
          <table:table-cell office:value-type="string">
            <text:p>Transferencia de C/C pix PJ e maq verm</text:p>
          </table:table-cell>
          <table:table-cell office:value-type="float" office:value="3413.18">
            <text:p>3413.18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59f006aa-c14e-4b0b-94b6-b11dbab1a90d","fromCashAccountId":6,"fromCashAccountCode":"CC_PIX_PJ_MAQ_VERM","fromCashAccountName":"C/C pix PJ e maq verm","toCashAccountId":7,"toCashAccountCode":"MAQ_AMARELA_PIX_CEL","toCashAccountName":"Maq Amarela/pix cel","amount":3413.18,"movementDate":"2026-04-27","notes":"","direction":"IN"}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OUT</text:p>
          </table:table-cell>
          <table:table-cell office:value-type="string">
            <text:p>Transferencia para Maq Amarela/pix cel</text:p>
          </table:table-cell>
          <table:table-cell office:value-type="float" office:value="3413.18">
            <text:p>3413.18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59f006aa-c14e-4b0b-94b6-b11dbab1a90d","fromCashAccountId":6,"fromCashAccountCode":"CC_PIX_PJ_MAQ_VERM","fromCashAccountName":"C/C pix PJ e maq verm","toCashAccountId":7,"toCashAccountCode":"MAQ_AMARELA_PIX_CEL","toCashAccountName":"Maq Amarela/pix cel","amount":3413.18,"movementDate":"2026-04-27","notes":"","direction":"OUT"}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IN</text:p>
          </table:table-cell>
          <table:table-cell office:value-type="string">
            <text:p>Transferencia de R$ com Denio</text:p>
          </table:table-cell>
          <table:table-cell office:value-type="float" office:value="897">
            <text:p>897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2f038790-da27-435d-8253-dde330510bd6","fromCashAccountId":8,"fromCashAccountCode":"R_COM_DENIO","fromCashAccountName":"R$ com Denio","toCashAccountId":7,"toCashAccountCode":"MAQ_AMARELA_PIX_CEL","toCashAccountName":"Maq Amarela/pix cel","amount":897,"movementDate":"2026-04-27","notes":"","direction":"IN"}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OUT</text:p>
          </table:table-cell>
          <table:table-cell office:value-type="string">
            <text:p>Transferencia para Maq Amarela/pix cel</text:p>
          </table:table-cell>
          <table:table-cell office:value-type="float" office:value="897">
            <text:p>897</text:p>
          </table:table-cell>
          <table:table-cell office:value-type="float" office:value="8">
            <text:p>8</text:p>
          </table:table-cell>
          <table:table-cell office:value-type="string">
            <text:p>R_COM_DENIO</text:p>
          </table:table-cell>
          <table:table-cell office:value-type="string">
            <text:p>R$ com De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2f038790-da27-435d-8253-dde330510bd6","fromCashAccountId":8,"fromCashAccountCode":"R_COM_DENIO","fromCashAccountName":"R$ com Denio","toCashAccountId":7,"toCashAccountCode":"MAQ_AMARELA_PIX_CEL","toCashAccountName":"Maq Amarela/pix cel","amount":897,"movementDate":"2026-04-27","notes":"","direction":"OUT"}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IN</text:p>
          </table:table-cell>
          <table:table-cell office:value-type="string">
            <text:p>Transferencia de Caixinha loja</text:p>
          </table:table-cell>
          <table:table-cell office:value-type="float" office:value="1090">
            <text:p>109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a1482d84-b419-4a64-a783-48e43ab5f469","fromCashAccountId":4,"fromCashAccountCode":"CAIXINHA_LOJA","fromCashAccountName":"Caixinha loja","toCashAccountId":7,"toCashAccountCode":"MAQ_AMARELA_PIX_CEL","toCashAccountName":"Maq Amarela/pix cel","amount":1090,"movementDate":"2026-04-27","notes":"","direction":"IN"}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2026-04-27</text:p>
          </table:table-cell>
          <table:table-cell office:value-type="string">
            <text:p>TRANSFERENCIA</text:p>
          </table:table-cell>
          <table:table-cell office:value-type="string">
            <text:p>TRANSFER_OUT</text:p>
          </table:table-cell>
          <table:table-cell office:value-type="string">
            <text:p>Transferencia para Maq Amarela/pix cel</text:p>
          </table:table-cell>
          <table:table-cell office:value-type="float" office:value="1090">
            <text:p>1090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ource":"INTERNAL_CASH_TRANSFER","transferKey":"a1482d84-b419-4a64-a783-48e43ab5f469","fromCashAccountId":4,"fromCashAccountCode":"CAIXINHA_LOJA","fromCashAccountName":"Caixinha loja","toCashAccountId":7,"toCashAccountCode":"MAQ_AMARELA_PIX_CEL","toCashAccountName":"Maq Amarela/pix cel","amount":1090,"movementDate":"2026-04-27","notes":"","direction":"OUT"}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2026-04-27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7-0003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27-0003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mista PDV"}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2026-04-27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7-000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R_COM_DENIO</text:p>
          </table:table-cell>
          <table:table-cell office:value-type="string">
            <text:p>R$ com Denio</text:p>
          </table:table-cell>
          <table:table-cell/>
          <table:table-cell/>
          <table:table-cell office:value-type="string">
            <text:p>PDV-20260427-0002</text:p>
          </table:table-cell>
          <table:table-cell/>
          <table:table-cell/>
          <table:table-cell/>
          <table:table-cell/>
          <table:table-cell office:value-type="string">
            <text:p>{"paymentMethod":"R_COM_DENIO","category":"Venda de serviço"}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2026-04-27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7-0001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 office:value-type="string">
            <text:p>PDV-20260427-0001</text:p>
          </table:table-cell>
          <table:table-cell/>
          <table:table-cell/>
          <table:table-cell/>
          <table:table-cell/>
          <table:table-cell office:value-type="string">
            <text:p>{"paymentMethod":"CC_PIX_PJ_MAQ_VERM","category":"Venda de serviço"}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Compra mousepad</text:p>
          </table:table-cell>
          <table:table-cell office:value-type="float" office:value="74.8">
            <text:p>74.8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NAO_DEFINIDO</text:p>
          </table:table-cell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}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Estoque inicial: dv3231 - Pilha alcalina AA Pct com 2 (Qtd: 2)</text:p>
          </table:table-cell>
          <table:table-cell office:value-type="float" office:value="7.8">
            <text:p>7.8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36,"catalogItemName":"dv3231 - Pilha alcalina AA Pct com 2","stockQuantity":2,"unitCost":3.9}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Estoque inicial: dv6655 - Pilha alcalina AAA Pct com 2 (Qtd: 2)</text:p>
          </table:table-cell>
          <table:table-cell office:value-type="float" office:value="7.8">
            <text:p>7.8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35,"catalogItemName":"dv6655 - Pilha alcalina AAA Pct com 2","stockQuantity":2,"unitCost":3.9}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Estoque inicial: dv8687 - Pilha alcalina AAA  Pct com 4 (Qtd: 5)</text:p>
          </table:table-cell>
          <table:table-cell office:value-type="float" office:value="34.5">
            <text:p>34.5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34,"catalogItemName":"dv8687 - Pilha alcalina AAA  Pct com 4","stockQuantity":5,"unitCost":6.9}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Estoque inicial: dv9090 - Pilha alcalina AA Pct com 4 (Qtd: 5)</text:p>
          </table:table-cell>
          <table:table-cell office:value-type="float" office:value="34.5">
            <text:p>34.5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33,"catalogItemName":"dv9090 - Pilha alcalina AA Pct com 4","stockQuantity":5,"unitCost":6.9}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mu7879 - Adaptador Bluetooth Mini Usb (Qtd: 1)</text:p>
          </table:table-cell>
          <table:table-cell office:value-type="float" office:value="21.9">
            <text:p>21.9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47,"catalogItemName":"mu7879 - Adaptador Bluetooth Mini Usb","quantity":1,"unitCost":21.9}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en2402 - Fonte real pcwells 550 - 501 ou outra (Qtd: 3)</text:p>
          </table:table-cell>
          <table:table-cell office:value-type="float" office:value="287.70000000000005">
            <text:p>287.70000000000005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68,"catalogItemName":"en2402 - Fonte real pcwells 550 - 501 ou outra","quantity":3,"unitCost":95.9}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2026-04-24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4-0001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/>
          <table:table-cell/>
          <table:table-cell office:value-type="string">
            <text:p>PDV-20260424-0001</text:p>
          </table:table-cell>
          <table:table-cell/>
          <table:table-cell/>
          <table:table-cell/>
          <table:table-cell/>
          <table:table-cell office:value-type="string">
            <text:p>{"paymentMethod":"CAIXINHA_LOJA","category":"Venda de serviço"}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2026-04-23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3-0004</text:p>
          </table:table-cell>
          <table:table-cell office:value-type="float" office:value="420">
            <text:p>420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/>
          <table:table-cell/>
          <table:table-cell office:value-type="string">
            <text:p>PDV-20260423-0004</text:p>
          </table:table-cell>
          <table:table-cell/>
          <table:table-cell/>
          <table:table-cell/>
          <table:table-cell/>
          <table:table-cell office:value-type="string">
            <text:p>{"paymentMethod":"CAIXINHA_LOJA","category":"Venda de produto"}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2026-04-23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3-0003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 office:value-type="string">
            <text:p>PDV-20260423-0003</text:p>
          </table:table-cell>
          <table:table-cell/>
          <table:table-cell/>
          <table:table-cell/>
          <table:table-cell/>
          <table:table-cell office:value-type="string">
            <text:p>{"paymentMethod":"CC_PIX_PJ_MAQ_VERM","category":"Venda mista PDV"}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2026-04-23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3-0002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string">
            <text:p>R_COM_DENIO</text:p>
          </table:table-cell>
          <table:table-cell office:value-type="string">
            <text:p>R$ com Denio</text:p>
          </table:table-cell>
          <table:table-cell/>
          <table:table-cell/>
          <table:table-cell office:value-type="string">
            <text:p>PDV-20260423-0002</text:p>
          </table:table-cell>
          <table:table-cell/>
          <table:table-cell/>
          <table:table-cell/>
          <table:table-cell/>
          <table:table-cell office:value-type="string">
            <text:p>{"paymentMethod":"R_COM_DENIO","category":"Venda mista PDV"}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Estoque inicial: mi6776 - Bateria para placa mãe  3v (Qtd: 5)</text:p>
          </table:table-cell>
          <table:table-cell office:value-type="float" office:value="8.9">
            <text:p>8.9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8,"catalogItemName":"mi6776 - Bateria para placa mãe  3v","stockQuantity":5,"unitCost":1.78}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Estoque inicial: co5566 - Cooler para processador intel/Amd (Qtd: 5)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7,"catalogItemName":"co5566 - Cooler para processador intel/Amd","stockQuantity":5,"unitCost":14.6}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Estoque inicial: co9988 - Cooler processador intel C3TCH  FC-20 (Qtd: 2)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6,"catalogItemName":"co9988 - Cooler processador intel C3TCH  FC-20","stockQuantity":2,"unitCost":19.5}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Estoque inicial: tm9987 - Mouse sem fio C3TECH Preto (Qtd: 2)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5,"catalogItemName":"tm9987 - Mouse sem fio C3TECH Preto","stockQuantity":2,"unitCost":18.5}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Estoque inicial: tm8787 - Mouse sem fio Multilaser (Qtd: 2)</text:p>
          </table:table-cell>
          <table:table-cell office:value-type="float" office:value="29.8">
            <text:p>29.8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4,"catalogItemName":"tm8787 - Mouse sem fio Multilaser","stockQuantity":2,"unitCost":14.9}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Estoque inicial: tm6677 - Mouse sem fio Targus (Qtd: 2)</text:p>
          </table:table-cell>
          <table:table-cell office:value-type="float" office:value="27.2">
            <text:p>27.2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3,"catalogItemName":"tm6677 - Mouse sem fio Targus","stockQuantity":2,"unitCost":13.6}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2026-04-23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3-000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 office:value-type="string">
            <text:p>PDV-20260423-0001</text:p>
          </table:table-cell>
          <table:table-cell/>
          <table:table-cell/>
          <table:table-cell/>
          <table:table-cell/>
          <table:table-cell office:value-type="string">
            <text:p>{"paymentMethod":"CC_PIX_PJ_MAQ_VERM","category":"Venda de produto"}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2026-04-22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2-000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 office:value-type="string">
            <text:p>PDV-20260422-0002</text:p>
          </table:table-cell>
          <table:table-cell/>
          <table:table-cell/>
          <table:table-cell/>
          <table:table-cell/>
          <table:table-cell office:value-type="string">
            <text:p>{"paymentMethod":"CC_PIX_PJ_MAQ_VERM","category":"Venda de produto"}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2026-04-22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2-0001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 office:value-type="string">
            <text:p>PDV-20260422-0001</text:p>
          </table:table-cell>
          <table:table-cell/>
          <table:table-cell/>
          <table:table-cell/>
          <table:table-cell/>
          <table:table-cell office:value-type="string">
            <text:p>{"paymentMethod":"CC_PIX_PJ_MAQ_VERM","category":"Venda de serviço"}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2026-04-20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0-00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/>
          <table:table-cell/>
          <table:table-cell office:value-type="string">
            <text:p>PDV-20260420-0002</text:p>
          </table:table-cell>
          <table:table-cell/>
          <table:table-cell/>
          <table:table-cell/>
          <table:table-cell/>
          <table:table-cell office:value-type="string">
            <text:p>{"paymentMethod":"CAIXINHA_LOJA","category":"Venda de serviço"}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2026-04-20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20-0001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20-0001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produto"}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2026-04-18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18-000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 office:value-type="string">
            <text:p>PDV-20260418-0001</text:p>
          </table:table-cell>
          <table:table-cell/>
          <table:table-cell/>
          <table:table-cell/>
          <table:table-cell/>
          <table:table-cell office:value-type="string">
            <text:p>{"paymentMethod":"CC_PIX_PJ_MAQ_VERM","category":"Venda de serviço"}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2026-04-17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17-000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17-0002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serviço"}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2026-04-17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17-0001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17-0001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serviço"}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2026-04-17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Compra cola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 office:value-type="string">
            <text:p>Compra de produto</text:p>
          </table:table-cell>
          <table:table-cell office:value-type="string">
            <text:p>NAO_DEFINIDO</text:p>
          </table:table-cell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}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co1010 - Cooler com led F7-L130M (Qtd: 3)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37,"catalogItemName":"co1010 - Cooler com led F7-L130M","quantity":3,"unitCost":11}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co1122 - Cooler G-VR300  Revenger (Qtd: 7)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63,"catalogItemName":"co1122 - Cooler G-VR300  Revenger","quantity":7,"unitCost":11}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16-0007</text:p>
          </table:table-cell>
          <table:table-cell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string">
            <text:p>ARTHUR</text:p>
          </table:table-cell>
          <table:table-cell office:value-type="string">
            <text:p>Arthur</text:p>
          </table:table-cell>
          <table:table-cell/>
          <table:table-cell/>
          <table:table-cell office:value-type="string">
            <text:p>PDV-20260416-0007</text:p>
          </table:table-cell>
          <table:table-cell/>
          <table:table-cell/>
          <table:table-cell/>
          <table:table-cell/>
          <table:table-cell office:value-type="string">
            <text:p>{"paymentMethod":"ARTHUR","category":"Venda de produto"}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ca4040 - Cabo de rede 2.5m Cat 6 pronto de fabrica (Qtd: 5)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67,"catalogItemName":"ca4040 - Cabo de rede 2.5m Cat 6 pronto de fabrica","quantity":5,"unitCost":10}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16-0006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16-0006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produto"}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16-0005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16-0005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produto"}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16 - Fonte HP/Asus pino 4 - 3,25a - 19v (FW183) (Qtd: 1)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52,"catalogItemName":"16 - Fonte HP/Asus pino 4 - 3,25a - 19v (FW183)","quantity":1,"unitCost":80}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re5566 - Conector RJ45 CAT 6 (Qtd: 10)</text:p>
          </table:table-cell>
          <table:table-cell office:value-type="float" office:value="3.2">
            <text:p>3.2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51,"catalogItemName":"re5566 - Conector RJ45 CAT 6","quantity":10,"unitCost":0.32}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re5577 - Conector rj45 CAT 5 (Qtd: 10)</text:p>
          </table:table-cell>
          <table:table-cell office:value-type="float" office:value="2.9">
            <text:p>2.9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50,"catalogItemName":"re5577 - Conector rj45 CAT 5","quantity":10,"unitCost":0.29}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dr5405 - Case ssd M.2 NVME USB (Qtd: 1)</text:p>
          </table:table-cell>
          <table:table-cell office:value-type="float" office:value="66.5">
            <text:p>66.5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49,"catalogItemName":"dr5405 - Case ssd M.2 NVME USB","quantity":1,"unitCost":66.5}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ca4205 - Cabo de Rede 5m Pronto de fábrica (Qtd: 1)</text:p>
          </table:table-cell>
          <table:table-cell office:value-type="float" office:value="14.9">
            <text:p>14.9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 office:value-type="string">
            <text:p>Compra de produto</text:p>
          </table:table-cell>
          <table:table-cell office:value-type="string">
            <text:p>MAQ_AMARELA_PIX_CEL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55,"catalogItemName":"ca4205 - Cabo de Rede 5m Pronto de fábrica","quantity":1,"unitCost":14.9}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en2402 - Fonte real pcwells 550 - 501 ou outra (Qtd: 2)</text:p>
          </table:table-cell>
          <table:table-cell office:value-type="float" office:value="191.8">
            <text:p>191.8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 office:value-type="string">
            <text:p>Compra de produto</text:p>
          </table:table-cell>
          <table:table-cell office:value-type="string">
            <text:p>BOLETOS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68,"catalogItemName":"en2402 - Fonte real pcwells 550 - 501 ou outra","quantity":2,"unitCost":95.9}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co1122 - Cooler G-VR300  Revenger (Qtd: 2)</text:p>
          </table:table-cell>
          <table:table-cell office:value-type="float" office:value="31.8">
            <text:p>31.8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 office:value-type="string">
            <text:p>Compra de produto</text:p>
          </table:table-cell>
          <table:table-cell office:value-type="string">
            <text:p>BOLETOS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63,"catalogItemName":"co1122 - Cooler G-VR300  Revenger","quantity":2,"unitCost":15.9}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mu7879 - Adaptador Bluetooth Mini Usb (Qtd: 1)</text:p>
          </table:table-cell>
          <table:table-cell office:value-type="float" office:value="21.9">
            <text:p>21.9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 office:value-type="string">
            <text:p>Compra de produto</text:p>
          </table:table-cell>
          <table:table-cell office:value-type="string">
            <text:p>BOLETOS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47,"catalogItemName":"mu7879 - Adaptador Bluetooth Mini Usb","quantity":1,"unitCost":21.9}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co2233 - Cooler para processador Intel (Qtd: 2)</text:p>
          </table:table-cell>
          <table:table-cell office:value-type="float" office:value="31.8">
            <text:p>31.8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 office:value-type="string">
            <text:p>Compra de produto</text:p>
          </table:table-cell>
          <table:table-cell office:value-type="string">
            <text:p>BOLETOS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64,"catalogItemName":"co2233 - Cooler para processador Intel","quantity":2,"unitCost":15.9}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Tm8877- Teclado com fio C3 Tech (Qtd: 5)</text:p>
          </table:table-cell>
          <table:table-cell office:value-type="float" office:value="92.5">
            <text:p>92.5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 office:value-type="string">
            <text:p>Compra de produto</text:p>
          </table:table-cell>
          <table:table-cell office:value-type="string">
            <text:p>BOLETOS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44,"catalogItemName":"Tm8877- Teclado com fio C3 Tech","quantity":5,"unitCost":18.5}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Compra extensao</text:p>
          </table:table-cell>
          <table:table-cell office:value-type="float" office:value="41.8">
            <text:p>41.8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 office:value-type="string">
            <text:p>Manutenção terceirizada</text:p>
          </table:table-cell>
          <table:table-cell office:value-type="string">
            <text:p>NAO_DEFINIDO</text:p>
          </table:table-cell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}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Compra Alcool isopropilico</text:p>
          </table:table-cell>
          <table:table-cell office:value-type="float" office:value="30.9">
            <text:p>30.9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 office:value-type="string">
            <text:p>Manutenção terceirizada</text:p>
          </table:table-cell>
          <table:table-cell office:value-type="string">
            <text:p>NAO_DEFINIDO</text:p>
          </table:table-cell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}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ca4406 - Cabo dvi x dvi (Qtd: 1)</text:p>
          </table:table-cell>
          <table:table-cell office:value-type="float" office:value="28.9">
            <text:p>28.9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 office:value-type="string">
            <text:p>Compra de produto</text:p>
          </table:table-cell>
          <table:table-cell office:value-type="string">
            <text:p>BOLETOS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69,"catalogItemName":"ca4406 - Cabo dvi x dvi","quantity":1,"unitCost":28.9}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FINANCE_ENTRY</text:p>
          </table:table-cell>
          <table:table-cell office:value-type="string">
            <text:p>Reposição de estoque: re2301 - Adaptador USB Wifi 600Mbps Dual Generico (Qtd: 3)</text:p>
          </table:table-cell>
          <table:table-cell office:value-type="float" office:value="101.69999999999999">
            <text:p>101.69999999999999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 office:value-type="string">
            <text:p>Compra de produto</text:p>
          </table:table-cell>
          <table:table-cell office:value-type="string">
            <text:p>BOLETOS</text:p>
          </table:table-cell>
          <table:table-cell/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93,"catalogItemName":"re2301 - Adaptador USB Wifi 600Mbps Dual Generico","quantity":3,"unitCost":33.9}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16-0004</text:p>
          </table:table-cell>
          <table:table-cell office:value-type="float" office:value="550">
            <text:p>550</text:p>
          </table:table-cell>
          <table:table-cell office:value-type="float" office:value="9">
            <text:p>9</text:p>
          </table:table-cell>
          <table:table-cell office:value-type="string">
            <text:p>OUTROS_REGINA</text:p>
          </table:table-cell>
          <table:table-cell office:value-type="string">
            <text:p>outros Regina</text:p>
          </table:table-cell>
          <table:table-cell/>
          <table:table-cell/>
          <table:table-cell office:value-type="string">
            <text:p>PDV-20260416-0004</text:p>
          </table:table-cell>
          <table:table-cell/>
          <table:table-cell/>
          <table:table-cell/>
          <table:table-cell/>
          <table:table-cell office:value-type="string">
            <text:p>{"paymentMethod":"OUTROS_REGINA","category":"Venda de produto"}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16-000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16-0003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produto"}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16-0002</text:p>
          </table:table-cell>
          <table:table-cell office:value-type="float" office:value="950">
            <text:p>95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16-0002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serviço"}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PDV_PAYMENT</text:p>
          </table:table-cell>
          <table:table-cell office:value-type="string">
            <text:p>Pagamento da venda PDV-20260416-0001</text:p>
          </table:table-cell>
          <table:table-cell office:value-type="float" office:value="4530">
            <text:p>4530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string">
            <text:p>PDV-20260416-0001</text:p>
          </table:table-cell>
          <table:table-cell/>
          <table:table-cell/>
          <table:table-cell/>
          <table:table-cell/>
          <table:table-cell office:value-type="string">
            <text:p>{"paymentMethod":"MAQ_AMARELA_PIX_CEL","category":"Venda de serviço"}</text:p>
          </table:table-cell>
        </table:table-row>
      </table:table>
      <table:table table:name="Lancamentos">
        <table:table-row>
          <table:table-cell office:value-type="string">
            <text:p>id</text:p>
          </table:table-cell>
          <table:table-cell office:value-type="string">
            <text:p>data_lancamento</text:p>
          </table:table-cell>
          <table:table-cell office:value-type="string">
            <text:p>tipo</text:p>
          </table:table-cell>
          <table:table-cell office:value-type="string">
            <text:p>categoria</text:p>
          </table:table-cell>
          <table:table-cell office:value-type="string">
            <text:p>descricao</text:p>
          </table:table-cell>
          <table:table-cell office:value-type="string">
            <text:p>valor</text:p>
          </table:table-cell>
          <table:table-cell office:value-type="string">
            <text:p>forma_pagamento</text:p>
          </table:table-cell>
          <table:table-cell office:value-type="string">
            <text:p>conta_caixa_id</text:p>
          </table:table-cell>
          <table:table-cell office:value-type="string">
            <text:p>conta_caixa_codigo</text:p>
          </table:table-cell>
          <table:table-cell office:value-type="string">
            <text:p>conta_caixa_nome</text:p>
          </table:table-cell>
          <table:table-cell office:value-type="string">
            <text:p>pedido_id</text:p>
          </table:table-cell>
          <table:table-cell office:value-type="string">
            <text:p>codigo_os</text:p>
          </table:table-cell>
          <table:table-cell office:value-type="string">
            <text:p>reposicao_id</text:p>
          </table:table-cell>
          <table:table-cell office:value-type="string">
            <text:p>workbook_origem</text:p>
          </table:table-cell>
          <table:table-cell office:value-type="string">
            <text:p>aba_origem</text:p>
          </table:table-cell>
          <table:table-cell office:value-type="string">
            <text:p>linha_origem</text:p>
          </table:table-cell>
          <table:table-cell office:value-type="string">
            <text:p>secao_legada</text:p>
          </table:table-cell>
          <table:table-cell office:value-type="string">
            <text:p>payload_bruto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2026-04-30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30-0002</text:p>
          </table:table-cell>
          <table:table-cell office:value-type="float" office:value="200">
            <text:p>20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49,"saleCode":"PDV-20260430-0002","category":"Venda de serviço"}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2026-04-30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30-0001</text:p>
          </table:table-cell>
          <table:table-cell office:value-type="float" office:value="400">
            <text:p>40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48,"saleCode":"PDV-20260430-0001","category":"Venda de serviço"}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2026-04-29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29-0002</text:p>
          </table:table-cell>
          <table:table-cell office:value-type="float" office:value="100">
            <text:p>10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47,"saleCode":"PDV-20260429-0002","category":"Venda de serviço"}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2026-04-29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Compra cola de madeira</text:p>
          </table:table-cell>
          <table:table-cell office:value-type="float" office:value="15">
            <text:p>15</text:p>
          </table:table-cell>
          <table:table-cell office:value-type="string">
            <text:p>NAO_DEFINIDO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/>
        </table:table-row>
        <table:table-row>
          <table:table-cell office:value-type="float" office:value="61">
            <text:p>61</text:p>
          </table:table-cell>
          <table:table-cell office:value-type="string">
            <text:p>2026-04-29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29-0001</text:p>
          </table:table-cell>
          <table:table-cell office:value-type="float" office:value="6">
            <text:p>6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46,"saleCode":"PDV-20260429-0001","category":"Venda de serviço"}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2026-04-27</text:p>
          </table:table-cell>
          <table:table-cell office:value-type="string">
            <text:p>RECEITA</text:p>
          </table:table-cell>
          <table:table-cell office:value-type="string">
            <text:p>Venda mista PDV</text:p>
          </table:table-cell>
          <table:table-cell office:value-type="string">
            <text:p>Venda PDV-20260427-0003</text:p>
          </table:table-cell>
          <table:table-cell office:value-type="float" office:value="65">
            <text:p>65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45,"saleCode":"PDV-20260427-0003","category":"Venda mista PDV"}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2026-04-27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27-0002</text:p>
          </table:table-cell>
          <table:table-cell office:value-type="float" office:value="6">
            <text:p>6</text:p>
          </table:table-cell>
          <table:table-cell office:value-type="string">
            <text:p>R_COM_DENIO</text:p>
          </table:table-cell>
          <table:table-cell office:value-type="float" office:value="8">
            <text:p>8</text:p>
          </table:table-cell>
          <table:table-cell office:value-type="string">
            <text:p>R_COM_DENIO</text:p>
          </table:table-cell>
          <table:table-cell office:value-type="string">
            <text:p>R$ com Denio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44,"saleCode":"PDV-20260427-0002","category":"Venda de serviço"}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2026-04-27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27-0001</text:p>
          </table:table-cell>
          <table:table-cell office:value-type="float" office:value="70">
            <text:p>70</text:p>
          </table:table-cell>
          <table:table-cell office:value-type="string">
            <text:p>CC_PIX_PJ_MAQ_VERM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43,"saleCode":"PDV-20260427-0001","category":"Venda de serviço"}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Compra mousepad</text:p>
          </table:table-cell>
          <table:table-cell office:value-type="float" office:value="74.8">
            <text:p>74.8</text:p>
          </table:table-cell>
          <table:table-cell office:value-type="string">
            <text:p>NAO_DEFINIDO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/>
        </table:table-row>
        <table:table-row>
          <table:table-cell office:value-type="float" office:value="56">
            <text:p>56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Estoque inicial: dv3231 - Pilha alcalina AA Pct com 2 (Qtd: 2)</text:p>
          </table:table-cell>
          <table:table-cell office:value-type="float" office:value="7.8">
            <text:p>7.8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55">
            <text:p>255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36,"catalogItemName":"dv3231 - Pilha alcalina AA Pct com 2","stockQuantity":2,"unitCost":3.9}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Estoque inicial: dv6655 - Pilha alcalina AAA Pct com 2 (Qtd: 2)</text:p>
          </table:table-cell>
          <table:table-cell office:value-type="float" office:value="7.8">
            <text:p>7.8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54">
            <text:p>254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35,"catalogItemName":"dv6655 - Pilha alcalina AAA Pct com 2","stockQuantity":2,"unitCost":3.9}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Estoque inicial: dv8687 - Pilha alcalina AAA  Pct com 4 (Qtd: 5)</text:p>
          </table:table-cell>
          <table:table-cell office:value-type="float" office:value="34.5">
            <text:p>34.5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53">
            <text:p>253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34,"catalogItemName":"dv8687 - Pilha alcalina AAA  Pct com 4","stockQuantity":5,"unitCost":6.9}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Estoque inicial: dv9090 - Pilha alcalina AA Pct com 4 (Qtd: 5)</text:p>
          </table:table-cell>
          <table:table-cell office:value-type="float" office:value="34.5">
            <text:p>34.5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52">
            <text:p>252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33,"catalogItemName":"dv9090 - Pilha alcalina AA Pct com 4","stockQuantity":5,"unitCost":6.9}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mu7879 - Adaptador Bluetooth Mini Usb (Qtd: 1)</text:p>
          </table:table-cell>
          <table:table-cell office:value-type="float" office:value="21.9">
            <text:p>21.9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47">
            <text:p>247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47,"catalogItemName":"mu7879 - Adaptador Bluetooth Mini Usb","quantity":1,"unitCost":21.9}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2026-04-24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en2402 - Fonte real pcwells 550 - 501 ou outra (Qtd: 3)</text:p>
          </table:table-cell>
          <table:table-cell office:value-type="float" office:value="287.70000000000005">
            <text:p>287.70000000000005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46">
            <text:p>246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68,"catalogItemName":"en2402 - Fonte real pcwells 550 - 501 ou outra","quantity":3,"unitCost":95.9}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2026-04-24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24-0001</text:p>
          </table:table-cell>
          <table:table-cell office:value-type="float" office:value="650">
            <text:p>650</text:p>
          </table:table-cell>
          <table:table-cell office:value-type="string">
            <text:p>CAIXINHA_LOJA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42,"saleCode":"PDV-20260424-0001","category":"Venda de serviço"}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2026-04-23</text:p>
          </table:table-cell>
          <table:table-cell office:value-type="string">
            <text:p>RECEITA</text:p>
          </table:table-cell>
          <table:table-cell office:value-type="string">
            <text:p>Venda de produto</text:p>
          </table:table-cell>
          <table:table-cell office:value-type="string">
            <text:p>Venda PDV-20260423-0004</text:p>
          </table:table-cell>
          <table:table-cell office:value-type="float" office:value="45">
            <text:p>45</text:p>
          </table:table-cell>
          <table:table-cell office:value-type="string">
            <text:p>CAIXINHA_LOJA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41,"saleCode":"PDV-20260423-0004","category":"Venda de produto"}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2026-04-23</text:p>
          </table:table-cell>
          <table:table-cell office:value-type="string">
            <text:p>RECEITA</text:p>
          </table:table-cell>
          <table:table-cell office:value-type="string">
            <text:p>Venda mista PDV</text:p>
          </table:table-cell>
          <table:table-cell office:value-type="string">
            <text:p>Venda PDV-20260423-0003</text:p>
          </table:table-cell>
          <table:table-cell office:value-type="float" office:value="390">
            <text:p>390</text:p>
          </table:table-cell>
          <table:table-cell office:value-type="string">
            <text:p>CC_PIX_PJ_MAQ_VERM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40,"saleCode":"PDV-20260423-0003","category":"Venda mista PDV"}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2026-04-23</text:p>
          </table:table-cell>
          <table:table-cell office:value-type="string">
            <text:p>RECEITA</text:p>
          </table:table-cell>
          <table:table-cell office:value-type="string">
            <text:p>Venda mista PDV</text:p>
          </table:table-cell>
          <table:table-cell office:value-type="string">
            <text:p>Venda PDV-20260423-0002</text:p>
          </table:table-cell>
          <table:table-cell office:value-type="float" office:value="120">
            <text:p>120</text:p>
          </table:table-cell>
          <table:table-cell office:value-type="string">
            <text:p>R_COM_DENIO</text:p>
          </table:table-cell>
          <table:table-cell office:value-type="float" office:value="8">
            <text:p>8</text:p>
          </table:table-cell>
          <table:table-cell office:value-type="string">
            <text:p>R_COM_DENIO</text:p>
          </table:table-cell>
          <table:table-cell office:value-type="string">
            <text:p>R$ com Denio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39,"saleCode":"PDV-20260423-0002","category":"Venda mista PDV"}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Estoque inicial: mi6776 - Bateria para placa mãe  3v (Qtd: 5)</text:p>
          </table:table-cell>
          <table:table-cell office:value-type="float" office:value="8.9">
            <text:p>8.9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45">
            <text:p>245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8,"catalogItemName":"mi6776 - Bateria para placa mãe  3v","stockQuantity":5,"unitCost":1.78}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Estoque inicial: co5566 - Cooler para processador intel/Amd (Qtd: 5)</text:p>
          </table:table-cell>
          <table:table-cell office:value-type="float" office:value="73">
            <text:p>73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44">
            <text:p>244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7,"catalogItemName":"co5566 - Cooler para processador intel/Amd","stockQuantity":5,"unitCost":14.6}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Estoque inicial: co9988 - Cooler processador intel C3TCH  FC-20 (Qtd: 2)</text:p>
          </table:table-cell>
          <table:table-cell office:value-type="float" office:value="39">
            <text:p>39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43">
            <text:p>243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6,"catalogItemName":"co9988 - Cooler processador intel C3TCH  FC-20","stockQuantity":2,"unitCost":19.5}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Estoque inicial: tm9987 - Mouse sem fio C3TECH Preto (Qtd: 2)</text:p>
          </table:table-cell>
          <table:table-cell office:value-type="float" office:value="37">
            <text:p>37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42">
            <text:p>242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5,"catalogItemName":"tm9987 - Mouse sem fio C3TECH Preto","stockQuantity":2,"unitCost":18.5}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Estoque inicial: tm8787 - Mouse sem fio Multilaser (Qtd: 2)</text:p>
          </table:table-cell>
          <table:table-cell office:value-type="float" office:value="29.8">
            <text:p>29.8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41">
            <text:p>241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4,"catalogItemName":"tm8787 - Mouse sem fio Multilaser","stockQuantity":2,"unitCost":14.9}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2026-04-23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Estoque inicial: tm6677 - Mouse sem fio Targus (Qtd: 2)</text:p>
          </table:table-cell>
          <table:table-cell office:value-type="float" office:value="27.2">
            <text:p>27.2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240">
            <text:p>240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INITIAL_STOCK","catalogItemId":223,"catalogItemName":"tm6677 - Mouse sem fio Targus","stockQuantity":2,"unitCost":13.6}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2026-04-23</text:p>
          </table:table-cell>
          <table:table-cell office:value-type="string">
            <text:p>RECEITA</text:p>
          </table:table-cell>
          <table:table-cell office:value-type="string">
            <text:p>Venda de produto</text:p>
          </table:table-cell>
          <table:table-cell office:value-type="string">
            <text:p>Venda PDV-20260423-0001</text:p>
          </table:table-cell>
          <table:table-cell office:value-type="float" office:value="15">
            <text:p>15</text:p>
          </table:table-cell>
          <table:table-cell office:value-type="string">
            <text:p>CC_PIX_PJ_MAQ_VERM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38,"saleCode":"PDV-20260423-0001","category":"Venda de produto"}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2026-04-22</text:p>
          </table:table-cell>
          <table:table-cell office:value-type="string">
            <text:p>RECEITA</text:p>
          </table:table-cell>
          <table:table-cell office:value-type="string">
            <text:p>Venda de produto</text:p>
          </table:table-cell>
          <table:table-cell office:value-type="string">
            <text:p>Venda PDV-20260422-0002</text:p>
          </table:table-cell>
          <table:table-cell office:value-type="float" office:value="25">
            <text:p>25</text:p>
          </table:table-cell>
          <table:table-cell office:value-type="string">
            <text:p>CC_PIX_PJ_MAQ_VERM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37,"saleCode":"PDV-20260422-0002","category":"Venda de produto"}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2026-04-22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22-0001</text:p>
          </table:table-cell>
          <table:table-cell office:value-type="float" office:value="4.5">
            <text:p>4.5</text:p>
          </table:table-cell>
          <table:table-cell office:value-type="string">
            <text:p>CC_PIX_PJ_MAQ_VERM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36,"saleCode":"PDV-20260422-0001","category":"Venda de serviço"}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2026-04-20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20-0002</text:p>
          </table:table-cell>
          <table:table-cell office:value-type="float" office:value="3">
            <text:p>3</text:p>
          </table:table-cell>
          <table:table-cell office:value-type="string">
            <text:p>CAIXINHA_LOJA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34,"saleCode":"PDV-20260420-0002","category":"Venda de serviço"}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2026-04-20</text:p>
          </table:table-cell>
          <table:table-cell office:value-type="string">
            <text:p>RECEITA</text:p>
          </table:table-cell>
          <table:table-cell office:value-type="string">
            <text:p>Venda de produto</text:p>
          </table:table-cell>
          <table:table-cell office:value-type="string">
            <text:p>Venda PDV-20260420-0001</text:p>
          </table:table-cell>
          <table:table-cell office:value-type="float" office:value="140">
            <text:p>14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33,"saleCode":"PDV-20260420-0001","category":"Venda de produto"}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2026-04-18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18-0001</text:p>
          </table:table-cell>
          <table:table-cell office:value-type="float" office:value="30">
            <text:p>30</text:p>
          </table:table-cell>
          <table:table-cell office:value-type="string">
            <text:p>CC_PIX_PJ_MAQ_VERM</text:p>
          </table:table-cell>
          <table:table-cell office:value-type="float" office:value="6">
            <text:p>6</text:p>
          </table:table-cell>
          <table:table-cell office:value-type="string">
            <text:p>CC_PIX_PJ_MAQ_VERM</text:p>
          </table:table-cell>
          <table:table-cell office:value-type="string">
            <text:p>C/C pix PJ e maq verm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32,"saleCode":"PDV-20260418-0001","category":"Venda de serviço"}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2026-04-17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17-0002</text:p>
          </table:table-cell>
          <table:table-cell office:value-type="float" office:value="500">
            <text:p>50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31,"saleCode":"PDV-20260417-0002","category":"Venda de serviço"}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2026-04-17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17-0001</text:p>
          </table:table-cell>
          <table:table-cell office:value-type="float" office:value="150">
            <text:p>15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30,"saleCode":"PDV-20260417-0001","category":"Venda de serviço"}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2026-04-17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Compra cola</text:p>
          </table:table-cell>
          <table:table-cell office:value-type="float" office:value="27">
            <text:p>27</text:p>
          </table:table-cell>
          <table:table-cell office:value-type="string">
            <text:p>NAO_DEFINIDO</text:p>
          </table:table-cell>
          <table:table-cell office:value-type="float" office:value="4">
            <text:p>4</text:p>
          </table:table-cell>
          <table:table-cell office:value-type="string">
            <text:p>CAIXINHA_LOJA</text:p>
          </table:table-cell>
          <table:table-cell office:value-type="string">
            <text:p>Caixinha loj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/>
        </table:table-row>
        <table:table-row>
          <table:table-cell office:value-type="float" office:value="26">
            <text:p>26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co1010 - Cooler com led F7-L130M (Qtd: 3)</text:p>
          </table:table-cell>
          <table:table-cell office:value-type="float" office:value="33">
            <text:p>33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193">
            <text:p>193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37,"catalogItemName":"co1010 - Cooler com led F7-L130M","quantity":3,"unitCost":11}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co1122 - Cooler G-VR300  Revenger (Qtd: 7)</text:p>
          </table:table-cell>
          <table:table-cell office:value-type="float" office:value="77">
            <text:p>77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192">
            <text:p>192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63,"catalogItemName":"co1122 - Cooler G-VR300  Revenger","quantity":7,"unitCost":11}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Venda de produto</text:p>
          </table:table-cell>
          <table:table-cell office:value-type="string">
            <text:p>Venda PDV-20260416-0007</text:p>
          </table:table-cell>
          <table:table-cell office:value-type="float" office:value="140">
            <text:p>140</text:p>
          </table:table-cell>
          <table:table-cell office:value-type="string">
            <text:p>ARTHUR</text:p>
          </table:table-cell>
          <table:table-cell office:value-type="float" office:value="11">
            <text:p>11</text:p>
          </table:table-cell>
          <table:table-cell office:value-type="string">
            <text:p>ARTHUR</text:p>
          </table:table-cell>
          <table:table-cell office:value-type="string">
            <text:p>Arthur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29,"saleCode":"PDV-20260416-0007","category":"Venda de produto"}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ca4040 - Cabo de rede 2.5m Cat 6 pronto de fabrica (Qtd: 5)</text:p>
          </table:table-cell>
          <table:table-cell office:value-type="float" office:value="50">
            <text:p>5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191">
            <text:p>191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67,"catalogItemName":"ca4040 - Cabo de rede 2.5m Cat 6 pronto de fabrica","quantity":5,"unitCost":10}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Venda de produto</text:p>
          </table:table-cell>
          <table:table-cell office:value-type="string">
            <text:p>Venda PDV-20260416-0006</text:p>
          </table:table-cell>
          <table:table-cell office:value-type="float" office:value="30">
            <text:p>3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28,"saleCode":"PDV-20260416-0006","category":"Venda de produto"}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Venda de produto</text:p>
          </table:table-cell>
          <table:table-cell office:value-type="string">
            <text:p>Venda PDV-20260416-0005</text:p>
          </table:table-cell>
          <table:table-cell office:value-type="float" office:value="220">
            <text:p>22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27,"saleCode":"PDV-20260416-0005","category":"Venda de produto"}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16 - Fonte HP/Asus pino 4 - 3,25a - 19v (FW183) (Qtd: 1)</text:p>
          </table:table-cell>
          <table:table-cell office:value-type="float" office:value="80">
            <text:p>8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190">
            <text:p>190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52,"catalogItemName":"16 - Fonte HP/Asus pino 4 - 3,25a - 19v (FW183)","quantity":1,"unitCost":80}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re5566 - Conector RJ45 CAT 6 (Qtd: 10)</text:p>
          </table:table-cell>
          <table:table-cell office:value-type="float" office:value="3.2">
            <text:p>3.2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189">
            <text:p>189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51,"catalogItemName":"re5566 - Conector RJ45 CAT 6","quantity":10,"unitCost":0.32}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re5577 - Conector rj45 CAT 5 (Qtd: 10)</text:p>
          </table:table-cell>
          <table:table-cell office:value-type="float" office:value="2.9">
            <text:p>2.9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188">
            <text:p>188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50,"catalogItemName":"re5577 - Conector rj45 CAT 5","quantity":10,"unitCost":0.29}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dr5405 - Case ssd M.2 NVME USB (Qtd: 1)</text:p>
          </table:table-cell>
          <table:table-cell office:value-type="float" office:value="66.5">
            <text:p>66.5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187">
            <text:p>187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49,"catalogItemName":"dr5405 - Case ssd M.2 NVME USB","quantity":1,"unitCost":66.5}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ca4205 - Cabo de Rede 5m Pronto de fábrica (Qtd: 1)</text:p>
          </table:table-cell>
          <table:table-cell office:value-type="float" office:value="14.9">
            <text:p>14.9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 office:value-type="float" office:value="186">
            <text:p>186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55,"catalogItemName":"ca4205 - Cabo de Rede 5m Pronto de fábrica","quantity":1,"unitCost":14.9}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en2402 - Fonte real pcwells 550 - 501 ou outra (Qtd: 2)</text:p>
          </table:table-cell>
          <table:table-cell office:value-type="float" office:value="191.8">
            <text:p>191.8</text:p>
          </table:table-cell>
          <table:table-cell office:value-type="string">
            <text:p>BOLETOS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/>
          <table:table-cell/>
          <table:table-cell office:value-type="float" office:value="185">
            <text:p>185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68,"catalogItemName":"en2402 - Fonte real pcwells 550 - 501 ou outra","quantity":2,"unitCost":95.9}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co1122 - Cooler G-VR300  Revenger (Qtd: 2)</text:p>
          </table:table-cell>
          <table:table-cell office:value-type="float" office:value="31.8">
            <text:p>31.8</text:p>
          </table:table-cell>
          <table:table-cell office:value-type="string">
            <text:p>BOLETOS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/>
          <table:table-cell/>
          <table:table-cell office:value-type="float" office:value="184">
            <text:p>184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63,"catalogItemName":"co1122 - Cooler G-VR300  Revenger","quantity":2,"unitCost":15.9}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mu7879 - Adaptador Bluetooth Mini Usb (Qtd: 1)</text:p>
          </table:table-cell>
          <table:table-cell office:value-type="float" office:value="21.9">
            <text:p>21.9</text:p>
          </table:table-cell>
          <table:table-cell office:value-type="string">
            <text:p>BOLETOS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/>
          <table:table-cell/>
          <table:table-cell office:value-type="float" office:value="183">
            <text:p>183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47,"catalogItemName":"mu7879 - Adaptador Bluetooth Mini Usb","quantity":1,"unitCost":21.9}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co2233 - Cooler para processador Intel (Qtd: 2)</text:p>
          </table:table-cell>
          <table:table-cell office:value-type="float" office:value="31.8">
            <text:p>31.8</text:p>
          </table:table-cell>
          <table:table-cell office:value-type="string">
            <text:p>BOLETOS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/>
          <table:table-cell/>
          <table:table-cell office:value-type="float" office:value="182">
            <text:p>182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64,"catalogItemName":"co2233 - Cooler para processador Intel","quantity":2,"unitCost":15.9}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Tm8877- Teclado com fio C3 Tech (Qtd: 5)</text:p>
          </table:table-cell>
          <table:table-cell office:value-type="float" office:value="92.5">
            <text:p>92.5</text:p>
          </table:table-cell>
          <table:table-cell office:value-type="string">
            <text:p>BOLETOS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/>
          <table:table-cell/>
          <table:table-cell office:value-type="float" office:value="180">
            <text:p>180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44,"catalogItemName":"Tm8877- Teclado com fio C3 Tech","quantity":5,"unitCost":18.5}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Manutenção terceirizada</text:p>
          </table:table-cell>
          <table:table-cell office:value-type="string">
            <text:p>Compra extensao</text:p>
          </table:table-cell>
          <table:table-cell office:value-type="float" office:value="41.8">
            <text:p>41.8</text:p>
          </table:table-cell>
          <table:table-cell office:value-type="string">
            <text:p>NAO_DEFINIDO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/>
        </table:table-row>
        <table:table-row>
          <table:table-cell office:value-type="float" office:value="8">
            <text:p>8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Manutenção terceirizada</text:p>
          </table:table-cell>
          <table:table-cell office:value-type="string">
            <text:p>Compra Alcool isopropilico</text:p>
          </table:table-cell>
          <table:table-cell office:value-type="float" office:value="30.9">
            <text:p>30.9</text:p>
          </table:table-cell>
          <table:table-cell office:value-type="string">
            <text:p>NAO_DEFINIDO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/>
        </table:table-row>
        <table:table-row>
          <table:table-cell office:value-type="float" office:value="7">
            <text:p>7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ca4406 - Cabo dvi x dvi (Qtd: 1)</text:p>
          </table:table-cell>
          <table:table-cell office:value-type="float" office:value="28.9">
            <text:p>28.9</text:p>
          </table:table-cell>
          <table:table-cell office:value-type="string">
            <text:p>BOLETOS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/>
          <table:table-cell/>
          <table:table-cell office:value-type="float" office:value="179">
            <text:p>179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169,"catalogItemName":"ca4406 - Cabo dvi x dvi","quantity":1,"unitCost":28.9}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2026-04-16</text:p>
          </table:table-cell>
          <table:table-cell office:value-type="string">
            <text:p>DESPESA</text:p>
          </table:table-cell>
          <table:table-cell office:value-type="string">
            <text:p>Compra de produto</text:p>
          </table:table-cell>
          <table:table-cell office:value-type="string">
            <text:p>Reposição de estoque: re2301 - Adaptador USB Wifi 600Mbps Dual Generico (Qtd: 3)</text:p>
          </table:table-cell>
          <table:table-cell office:value-type="float" office:value="101.69999999999999">
            <text:p>101.69999999999999</text:p>
          </table:table-cell>
          <table:table-cell office:value-type="string">
            <text:p>BOLETOS</text:p>
          </table:table-cell>
          <table:table-cell office:value-type="float" office:value="10">
            <text:p>10</text:p>
          </table:table-cell>
          <table:table-cell office:value-type="string">
            <text:p>BOLETOS</text:p>
          </table:table-cell>
          <table:table-cell office:value-type="string">
            <text:p>boletos</text:p>
          </table:table-cell>
          <table:table-cell/>
          <table:table-cell/>
          <table:table-cell office:value-type="float" office:value="178">
            <text:p>178</text:p>
          </table:table-cell>
          <table:table-cell/>
          <table:table-cell/>
          <table:table-cell/>
          <table:table-cell office:value-type="string">
            <text:p>COMPRAS</text:p>
          </table:table-cell>
          <table:table-cell office:value-type="string">
            <text:p>{"source":"CATALOG_REPLENISHMENT","catalogItemId":93,"catalogItemName":"re2301 - Adaptador USB Wifi 600Mbps Dual Generico","quantity":3,"unitCost":33.9}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Venda de produto</text:p>
          </table:table-cell>
          <table:table-cell office:value-type="string">
            <text:p>Venda PDV-20260416-0004</text:p>
          </table:table-cell>
          <table:table-cell office:value-type="float" office:value="140">
            <text:p>140</text:p>
          </table:table-cell>
          <table:table-cell office:value-type="string">
            <text:p>OUTROS_REGINA</text:p>
          </table:table-cell>
          <table:table-cell office:value-type="float" office:value="9">
            <text:p>9</text:p>
          </table:table-cell>
          <table:table-cell office:value-type="string">
            <text:p>OUTROS_REGINA</text:p>
          </table:table-cell>
          <table:table-cell office:value-type="string">
            <text:p>outros Regin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26,"saleCode":"PDV-20260416-0004","category":"Venda de produto"}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Venda de produto</text:p>
          </table:table-cell>
          <table:table-cell office:value-type="string">
            <text:p>Venda PDV-20260416-0003</text:p>
          </table:table-cell>
          <table:table-cell office:value-type="float" office:value="25">
            <text:p>25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25,"saleCode":"PDV-20260416-0003","category":"Venda de produto"}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16-0002</text:p>
          </table:table-cell>
          <table:table-cell office:value-type="float" office:value="950">
            <text:p>95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24,"saleCode":"PDV-20260416-0002","category":"Venda de serviço"}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6-04-16</text:p>
          </table:table-cell>
          <table:table-cell office:value-type="string">
            <text:p>RECEITA</text:p>
          </table:table-cell>
          <table:table-cell office:value-type="string">
            <text:p>Venda de serviço</text:p>
          </table:table-cell>
          <table:table-cell office:value-type="string">
            <text:p>Venda PDV-20260416-0001</text:p>
          </table:table-cell>
          <table:table-cell office:value-type="float" office:value="4530">
            <text:p>4530</text:p>
          </table:table-cell>
          <table:table-cell office:value-type="string">
            <text:p>MAQ_AMARELA_PIX_CEL</text:p>
          </table:table-cell>
          <table:table-cell office:value-type="float" office:value="7">
            <text:p>7</text:p>
          </table:table-cell>
          <table:table-cell office:value-type="string">
            <text:p>MAQ_AMARELA_PIX_CEL</text:p>
          </table:table-cell>
          <table:table-cell office:value-type="string">
            <text:p>Maq Amarela/pix cel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NTRADAS_SAIDAS</text:p>
          </table:table-cell>
          <table:table-cell office:value-type="string">
            <text:p>{"source":"POS_SALE","saleId":23,"saleCode":"PDV-20260416-0001","category":"Venda de serviço"}</text:p>
          </table:table-cell>
        </table:table-row>
      </table:table>
      <table:table table:name="Estoque">
        <table:table-row>
          <table:table-cell office:value-type="string">
            <text:p>id</text:p>
          </table:table-cell>
          <table:table-cell office:value-type="string">
            <text:p>sku</text:p>
          </table:table-cell>
          <table:table-cell office:value-type="string">
            <text:p>nome</text:p>
          </table:table-cell>
          <table:table-cell office:value-type="string">
            <text:p>marca</text:p>
          </table:table-cell>
          <table:table-cell office:value-type="string">
            <text:p>categoria</text:p>
          </table:table-cell>
          <table:table-cell office:value-type="string">
            <text:p>subcategoria</text:p>
          </table:table-cell>
          <table:table-cell office:value-type="string">
            <text:p>condicao</text:p>
          </table:table-cell>
          <table:table-cell office:value-type="string">
            <text:p>estoque</text:p>
          </table:table-cell>
          <table:table-cell office:value-type="string">
            <text:p>estoque_minimo</text:p>
          </table:table-cell>
          <table:table-cell office:value-type="string">
            <text:p>custo</text:p>
          </table:table-cell>
          <table:table-cell office:value-type="string">
            <text:p>preco</text:p>
          </table:table-cell>
          <table:table-cell office:value-type="string">
            <text:p>valor_custo_estoque</text:p>
          </table:table-cell>
          <table:table-cell office:value-type="string">
            <text:p>valor_venda_estoque</text:p>
          </table:table-cell>
          <table:table-cell office:value-type="string">
            <text:p>situacao_estoque</text:p>
          </table:table-cell>
          <table:table-cell office:value-type="string">
            <text:p>ativo</text:p>
          </table:table-cell>
          <table:table-cell office:value-type="string">
            <text:p>uso_em_o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FT006C17800008</text:p>
          </table:table-cell>
          <table:table-cell office:value-type="string">
            <text:p>11 - Fonte Asus pino 2,3 - 2,1a - 19v (FT006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Baix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FT119C4402314</text:p>
          </table:table-cell>
          <table:table-cell office:value-type="string">
            <text:p>13 - Fonte Sans/acer/LG- pino 3 - 3,42A- 19,0v- FT 119</text:p>
          </table:table-cell>
          <table:table-cell/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FT135C3631912</text:p>
          </table:table-cell>
          <table:table-cell office:value-type="string">
            <text:p>14 - Fonte Positivo pino 3 - 3a - 5v (FT135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2">
            <text:p>152</text:p>
          </table:table-cell>
          <table:table-cell/>
          <table:table-cell office:value-type="string">
            <text:p>16 - Fonte HP/Asus pino 4 - 3,25a - 19v (FW183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FT109C4280004</text:p>
          </table:table-cell>
          <table:table-cell office:value-type="string">
            <text:p>17 - Fonte Dell ultra pino 4 - 4,62a - 19,5v (FT109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Baix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FW133C4400068</text:p>
          </table:table-cell>
          <table:table-cell office:value-type="string">
            <text:p>22 - Fonte Lenovo pino 4 - 3,25a - 20v (FW133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FT112C4090022</text:p>
          </table:table-cell>
          <table:table-cell office:value-type="string">
            <text:p>23 - Fonte HP pino 4,5 - 3,33a - 19,5v (FT112)</text:p>
          </table:table-cell>
          <table:table-cell/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FT113C3930154</text:p>
          </table:table-cell>
          <table:table-cell office:value-type="string">
            <text:p>24 - Fonte HP pino 4,5 - 4,62a - 19,5v (FT113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FT126C4822939</text:p>
          </table:table-cell>
          <table:table-cell office:value-type="string">
            <text:p>25 - Fonte Dell pino 4,5 - 3,34a - 19,5v (FT126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7898456512325</text:p>
          </table:table-cell>
          <table:table-cell office:value-type="string">
            <text:p>27 - Fonte Asus pino 4,8 - 3,0a - 12,8v (FT005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FT016C3930032</text:p>
          </table:table-cell>
          <table:table-cell office:value-type="string">
            <text:p>31 - Fonte HP pino 4,8 - 3,5a - 18,5v (FT016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7898456512312</text:p>
          </table:table-cell>
          <table:table-cell office:value-type="string">
            <text:p>32 - Fonte Philco pino 4,8 - 1,58a - 19v (FT117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FT018C23600017</text:p>
          </table:table-cell>
          <table:table-cell office:value-type="string">
            <text:p>33 - Fonte HP/toshiba pino 4,8 - 4,74a - 19v (FT018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FT104C2690056</text:p>
          </table:table-cell>
          <table:table-cell office:value-type="string">
            <text:p>35 - Fonte HP pino 4,8 - 3,33a - 19,5v (FT104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FT002C4370472</text:p>
          </table:table-cell>
          <table:table-cell office:value-type="string">
            <text:p>36 - Fonte acer pino 5,5 - 3,42a - 19v (FT002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FT003C4370050</text:p>
          </table:table-cell>
          <table:table-cell office:value-type="string">
            <text:p>37 - Fonte acer pino 5,5 - 4,75a - 19v (FT003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FT028C35035296</text:p>
          </table:table-cell>
          <table:table-cell office:value-type="string">
            <text:p>41 - Fonte Sansung pino 5,5 - 3,16a - 19v (FT028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FT088C3790139</text:p>
          </table:table-cell>
          <table:table-cell office:value-type="string">
            <text:p>42 - Fonte Sansung pino 5,5 - 4,75a - 19v (FT88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FT036C4090240</text:p>
          </table:table-cell>
          <table:table-cell office:value-type="string">
            <text:p>43 - Fonte Toshiba/Itaút/Asus/positivo pino 5,5 - 3,42a - 19v (FT036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FT037C4280020</text:p>
          </table:table-cell>
          <table:table-cell office:value-type="string">
            <text:p>44 - Fonte Toshiba/Itaút/Asus/positivo pino 5,5 - 3,75a - 19v (FT037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FT008C35537276</text:p>
          </table:table-cell>
          <table:table-cell office:value-type="string">
            <text:p>45 - Fonte Toshiba/lenovo/cce pino 5,5 - 3,25a - 20v (FT008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FT092C3840112</text:p>
          </table:table-cell>
          <table:table-cell office:value-type="string">
            <text:p>46 - Fonte LG pino 6 - 3,42a - 19v (FT0,92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em estoq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FT028C20100066</text:p>
          </table:table-cell>
          <table:table-cell office:value-type="string">
            <text:p>47 - Fonte Sony pino 6,5 - 4,0a - 16v (FT-)</text:p>
          </table:table-cell>
          <table:table-cell office:value-type="string">
            <text:p>Bringi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FT133C2790923</text:p>
          </table:table-cell>
          <table:table-cell office:value-type="string">
            <text:p>51 - Fonte HP pino 7,4 - 3,5a - 18,5v (FT015)</text:p>
          </table:table-cell>
          <table:table-cell office:value-type="string">
            <text:p>Bring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FT017C3710012</text:p>
          </table:table-cell>
          <table:table-cell office:value-type="string">
            <text:p>52 - Fonte HP pino 7,4 - 4,75a - 19v (FT017)</text:p>
          </table:table-cell>
          <table:table-cell office:value-type="string">
            <text:p>Bring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FT103C4200113</text:p>
          </table:table-cell>
          <table:table-cell office:value-type="string">
            <text:p>54 - Fonte dell pino 7,4 - 4,62a - 19,5v (FT043)</text:p>
          </table:table-cell>
          <table:table-cell office:value-type="string">
            <text:p>Bring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FT170C3930016</text:p>
          </table:table-cell>
          <table:table-cell office:value-type="string">
            <text:p>55 - Fonte Celular/lenovo tipo c - 3,25a - 20v (FT170)</text:p>
          </table:table-cell>
          <table:table-cell office:value-type="string">
            <text:p>Bring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FT103C4090045</text:p>
          </table:table-cell>
          <table:table-cell office:value-type="string">
            <text:p>56 - Fonte Lenovo retangular - 3,25a- 20v (FT103)</text:p>
          </table:table-cell>
          <table:table-cell office:value-type="string">
            <text:p>Bring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em estoq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2100002016561</text:p>
          </table:table-cell>
          <table:table-cell office:value-type="string">
            <text:p>57 - Fonte Universal p/ Note</text:p>
          </table:table-cell>
          <table:table-cell/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.9">
            <text:p>73.9</text:p>
          </table:table-cell>
          <table:table-cell office:value-type="float" office:value="120">
            <text:p>120</text:p>
          </table:table-cell>
          <table:table-cell office:value-type="float" office:value="73.9">
            <text:p>73.9</text:p>
          </table:table-cell>
          <table:table-cell office:value-type="float" office:value="120">
            <text:p>1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FT126C21700297</text:p>
          </table:table-cell>
          <table:table-cell office:value-type="string">
            <text:p>58 - Fonte Monitor Diversos tronos, LG</text:p>
          </table:table-cell>
          <table:table-cell office:value-type="string">
            <text:p>Bringt</text:p>
          </table:table-cell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2100002025679</text:p>
          </table:table-cell>
          <table:table-cell office:value-type="string">
            <text:p>ca2312 - Cx01 cabo hdmi 4k 1,8M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45">
            <text:p>45</text:p>
          </table:table-cell>
          <table:table-cell office:value-type="float" office:value="72.5">
            <text:p>72.5</text:p>
          </table:table-cell>
          <table:table-cell office:value-type="float" office:value="225">
            <text:p>22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2009082909087</text:p>
          </table:table-cell>
          <table:table-cell office:value-type="string">
            <text:p>ca2403 - cx01 cabo hdmi Articulado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2100002019302</text:p>
          </table:table-cell>
          <table:table-cell office:value-type="string">
            <text:p>ca3201 - CX02 Cabo VGA 1.5m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25">
            <text:p>25</text:p>
          </table:table-cell>
          <table:table-cell office:value-type="float" office:value="35.7">
            <text:p>35.7</text:p>
          </table:table-cell>
          <table:table-cell office:value-type="float" office:value="75">
            <text:p>7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7898594126960</text:p>
          </table:table-cell>
          <table:table-cell office:value-type="string">
            <text:p>ca3301 - CX02 Cabo VGA 3m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7">
            <text:p>167</text:p>
          </table:table-cell>
          <table:table-cell/>
          <table:table-cell office:value-type="string">
            <text:p>ca4040 - Cabo de rede 2.5m Cat 6 pronto de fabrica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602940112987</text:p>
          </table:table-cell>
          <table:table-cell office:value-type="string">
            <text:p>ca4101 - Cx03 Cabo de rede de 1m até 2,9m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5">
            <text:p>155</text:p>
          </table:table-cell>
          <table:table-cell/>
          <table:table-cell office:value-type="string">
            <text:p>ca4205 - Cabo de Rede 5m Pronto de fábrica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9">
            <text:p>14.9</text:p>
          </table:table-cell>
          <table:table-cell office:value-type="float" office:value="55">
            <text:p>55</text:p>
          </table:table-cell>
          <table:table-cell office:value-type="float" office:value="14.9">
            <text:p>14.9</text:p>
          </table:table-cell>
          <table:table-cell office:value-type="float" office:value="55">
            <text:p>5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2404870212806</text:p>
          </table:table-cell>
          <table:table-cell office:value-type="string">
            <text:p>ca4305 - Cabo de Rede 10m Pronto de fábrica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9">
            <text:p>169</text:p>
          </table:table-cell>
          <table:table-cell/>
          <table:table-cell office:value-type="string">
            <text:p>ca4406 - Cabo dvi x dvi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9">
            <text:p>28.9</text:p>
          </table:table-cell>
          <table:table-cell office:value-type="float" office:value="45">
            <text:p>45</text:p>
          </table:table-cell>
          <table:table-cell office:value-type="float" office:value="57.9">
            <text:p>57.9</text:p>
          </table:table-cell>
          <table:table-cell office:value-type="float" office:value="90">
            <text:p>9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2100002017766</text:p>
          </table:table-cell>
          <table:table-cell office:value-type="string">
            <text:p>ca5201 - Cx04 Extensão USB 1,5m (aproximadamente)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2100002017599</text:p>
          </table:table-cell>
          <table:table-cell office:value-type="string">
            <text:p>ca5301 - Cx04 Extensão USB - 3m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150">
            <text:p>1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2100002017537</text:p>
          </table:table-cell>
          <table:table-cell office:value-type="string">
            <text:p>ca5509 - Cx04 Extensão USB - 5m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9">
            <text:p>21.9</text:p>
          </table:table-cell>
          <table:table-cell office:value-type="float" office:value="35">
            <text:p>35</text:p>
          </table:table-cell>
          <table:table-cell office:value-type="float" office:value="43.8">
            <text:p>43.8</text:p>
          </table:table-cell>
          <table:table-cell office:value-type="float" office:value="70">
            <text:p>7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2100002026034</text:p>
          </table:table-cell>
          <table:table-cell office:value-type="string">
            <text:p>ca5602 - Cabo usb x impressora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float" office:value="25">
            <text:p>25</text:p>
          </table:table-cell>
          <table:table-cell office:value-type="float" office:value="18.2">
            <text:p>18.2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10449066</text:p>
          </table:table-cell>
          <table:table-cell office:value-type="string">
            <text:p>ca6101 - Cx05 Cabo    P2xP2    varios tamanhos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2100002025273</text:p>
          </table:table-cell>
          <table:table-cell office:value-type="string">
            <text:p>ca6301 - Cx05  Cabo   EXTENSAO P2  varios tamanhos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1236547980054</text:p>
          </table:table-cell>
          <table:table-cell office:value-type="string">
            <text:p>ca8101 - Cx06 Cabo de note 1m a 2,9m tripolar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1236547980045</text:p>
          </table:table-cell>
          <table:table-cell office:value-type="string">
            <text:p>ca8201 - Cx06 Cabo bipolar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7513579861425</text:p>
          </table:table-cell>
          <table:table-cell office:value-type="string">
            <text:p>ca8301 - Cx07 Cabo de energia desk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1236547980032</text:p>
          </table:table-cell>
          <table:table-cell office:value-type="string">
            <text:p>ca8507 - usb x usb diversos tamanhos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7899838874715</text:p>
          </table:table-cell>
          <table:table-cell office:value-type="string">
            <text:p>ce4009 - Fone de celular ou de computador - 2 cortes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7908417101453</text:p>
          </table:table-cell>
          <table:table-cell office:value-type="string">
            <text:p>ce6510 - suporte de celular para retrovisor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2308751909794</text:p>
          </table:table-cell>
          <table:table-cell office:value-type="string">
            <text:p>ce6607 - suporte celular p/ braço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7908417104201</text:p>
          </table:table-cell>
          <table:table-cell office:value-type="string">
            <text:p>ce6610 - suporte de celular magnetico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6955581352328</text:p>
          </table:table-cell>
          <table:table-cell office:value-type="string">
            <text:p>ce7201 - Cabo tipo C para tipo C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7908417105178</text:p>
          </table:table-cell>
          <table:table-cell office:value-type="string">
            <text:p>ce7402 - Cabo USB A-M p/ Iphone 1,0M 5,0A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25">
            <text:p>25</text:p>
          </table:table-cell>
          <table:table-cell office:value-type="float" office:value="17.2">
            <text:p>17.2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7898615159618</text:p>
          </table:table-cell>
          <table:table-cell office:value-type="string">
            <text:p>ce7501 - cabo usb a computador para tipo c celular novo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16030701</text:p>
          </table:table-cell>
          <table:table-cell office:value-type="string">
            <text:p>ce7530 - Carregador tomada c/2 usb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9">
            <text:p>21.9</text:p>
          </table:table-cell>
          <table:table-cell office:value-type="float" office:value="40">
            <text:p>40</text:p>
          </table:table-cell>
          <table:table-cell office:value-type="float" office:value="21.9">
            <text:p>21.9</text:p>
          </table:table-cell>
          <table:table-cell office:value-type="float" office:value="40">
            <text:p>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7897375169592</text:p>
          </table:table-cell>
          <table:table-cell office:value-type="string">
            <text:p>ce7562 - Cabo de carregador V8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float" office:value="20">
            <text:p>20</text:p>
          </table:table-cell>
          <table:table-cell office:value-type="float" office:value="11.8">
            <text:p>11.8</text:p>
          </table:table-cell>
          <table:table-cell office:value-type="float" office:value="40">
            <text:p>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7898566202449</text:p>
          </table:table-cell>
          <table:table-cell office:value-type="string">
            <text:p>ce7563 - Cabo USB X micro USB 1.5m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9">
            <text:p>7.9</text:p>
          </table:table-cell>
          <table:table-cell office:value-type="float" office:value="20">
            <text:p>20</text:p>
          </table:table-cell>
          <table:table-cell office:value-type="float" office:value="7.9">
            <text:p>7.9</text:p>
          </table:table-cell>
          <table:table-cell office:value-type="float" office:value="20">
            <text:p>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7908228401193</text:p>
          </table:table-cell>
          <table:table-cell office:value-type="string">
            <text:p>ce8409 - carregador turbo IVON ou EKASA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.9">
            <text:p>44.9</text:p>
          </table:table-cell>
          <table:table-cell office:value-type="float" office:value="65">
            <text:p>65</text:p>
          </table:table-cell>
          <table:table-cell office:value-type="float" office:value="44.9">
            <text:p>44.9</text:p>
          </table:table-cell>
          <table:table-cell office:value-type="float" office:value="65">
            <text:p>6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7908639900322</text:p>
          </table:table-cell>
          <table:table-cell office:value-type="string">
            <text:p>co1010 - Cooler com led F7-L130M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3">
            <text:p>163</text:p>
          </table:table-cell>
          <table:table-cell/>
          <table:table-cell office:value-type="string">
            <text:p>co1122 - Cooler G-VR300  Revenger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8.8">
            <text:p>108.8</text:p>
          </table:table-cell>
          <table:table-cell office:value-type="float" office:value="405">
            <text:p>40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6955581351444</text:p>
          </table:table-cell>
          <table:table-cell office:value-type="string">
            <text:p>co1515 - Cooler com led  DEX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7898506459162</text:p>
          </table:table-cell>
          <table:table-cell office:value-type="string">
            <text:p>co2015 - Base para notebook com cooler multilaser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7898555213111</text:p>
          </table:table-cell>
          <table:table-cell office:value-type="string">
            <text:p>co2016 - Base para notebook com cooler C3TECH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em estoq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4">
            <text:p>164</text:p>
          </table:table-cell>
          <table:table-cell/>
          <table:table-cell office:value-type="string">
            <text:p>co2233 - Cooler para processador Intel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45">
            <text:p>45</text:p>
          </table:table-cell>
          <table:table-cell office:value-type="float" office:value="15.9">
            <text:p>15.9</text:p>
          </table:table-cell>
          <table:table-cell office:value-type="float" office:value="45">
            <text:p>4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7908552000710</text:p>
          </table:table-cell>
          <table:table-cell office:value-type="string">
            <text:p>co3131 - Cooler para gabinete Knup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7898944009806</text:p>
          </table:table-cell>
          <table:table-cell office:value-type="string">
            <text:p>co4101 - Cooler AMD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789555210318</text:p>
          </table:table-cell>
          <table:table-cell office:value-type="string">
            <text:p>co4545 - Cooler com led F7-100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7">
            <text:p>227</text:p>
          </table:table-cell>
          <table:table-cell/>
          <table:table-cell office:value-type="string">
            <text:p>co5566 - Cooler para processador intel/Amd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45">
            <text:p>45</text:p>
          </table:table-cell>
          <table:table-cell office:value-type="float" office:value="58.4">
            <text:p>58.4</text:p>
          </table:table-cell>
          <table:table-cell office:value-type="float" office:value="180">
            <text:p>1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6">
            <text:p>226</text:p>
          </table:table-cell>
          <table:table-cell/>
          <table:table-cell office:value-type="string">
            <text:p>co9988 - Cooler processador intel C3TCH  FC-20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5">
            <text:p>285</text:p>
          </table:table-cell>
          <table:table-cell/>
          <table:table-cell office:value-type="string">
            <text:p>Cooler 12 cm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6">
            <text:p>286</text:p>
          </table:table-cell>
          <table:table-cell/>
          <table:table-cell office:value-type="string">
            <text:p>Cooler 20 cm</text:p>
          </table:table-cell>
          <table:table-cell/>
          <table:table-cell office:value-type="string">
            <text:p>Refrigeraçã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6">
            <text:p>266</text:p>
          </table:table-cell>
          <table:table-cell/>
          <table:table-cell office:value-type="string">
            <text:p>CPU AMD Athon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2">
            <text:p>272</text:p>
          </table:table-cell>
          <table:table-cell/>
          <table:table-cell office:value-type="string">
            <text:p>CPU amd fx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9">
            <text:p>269</text:p>
          </table:table-cell>
          <table:table-cell/>
          <table:table-cell office:value-type="string">
            <text:p>CPU i3 2ª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1">
            <text:p>271</text:p>
          </table:table-cell>
          <table:table-cell/>
          <table:table-cell office:value-type="string">
            <text:p>CPU i3 3ª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8">
            <text:p>268</text:p>
          </table:table-cell>
          <table:table-cell/>
          <table:table-cell office:value-type="string">
            <text:p>CPU i5 2ª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0">
            <text:p>270</text:p>
          </table:table-cell>
          <table:table-cell/>
          <table:table-cell office:value-type="string">
            <text:p>CPU I5 3ª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90">
            <text:p>190</text:p>
          </table:table-cell>
          <table:table-cell office:value-type="float" office:value="90">
            <text:p>90</text:p>
          </table:table-cell>
          <table:table-cell office:value-type="float" office:value="190">
            <text:p>19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3">
            <text:p>273</text:p>
          </table:table-cell>
          <table:table-cell/>
          <table:table-cell office:value-type="string">
            <text:p>CPU I5 4ª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7">
            <text:p>267</text:p>
          </table:table-cell>
          <table:table-cell/>
          <table:table-cell office:value-type="string">
            <text:p>CPU Intel G2030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3">
            <text:p>243</text:p>
          </table:table-cell>
          <table:table-cell/>
          <table:table-cell office:value-type="string">
            <text:p>Cpu- Pentium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USAD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4">
            <text:p>244</text:p>
          </table:table-cell>
          <table:table-cell/>
          <table:table-cell office:value-type="string">
            <text:p>Cpu-Core 2 duo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USAD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5">
            <text:p>245</text:p>
          </table:table-cell>
          <table:table-cell/>
          <table:table-cell office:value-type="string">
            <text:p>Cpu-Dual E2180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USAD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7898476326136</text:p>
          </table:table-cell>
          <table:table-cell office:value-type="string">
            <text:p>dr3408 - Pen drive 2.0 16gb v42 3.0 v55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7898476326129</text:p>
          </table:table-cell>
          <table:table-cell office:value-type="string">
            <text:p>dr3502 - Pen drive 8gb multi prata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35">
            <text:p>35</text:p>
          </table:table-cell>
          <table:table-cell office:value-type="float" office:value="59.7">
            <text:p>59.7</text:p>
          </table:table-cell>
          <table:table-cell office:value-type="float" office:value="105">
            <text:p>10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7898476328710</text:p>
          </table:table-cell>
          <table:table-cell office:value-type="string">
            <text:p>dr3605 - Pen Drive 32GB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7898506456345</text:p>
          </table:table-cell>
          <table:table-cell office:value-type="string">
            <text:p>dr3702 - Pen drive 64Gb Multi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.9">
            <text:p>36.9</text:p>
          </table:table-cell>
          <table:table-cell office:value-type="float" office:value="60">
            <text:p>60</text:p>
          </table:table-cell>
          <table:table-cell office:value-type="float" office:value="73.8">
            <text:p>73.8</text:p>
          </table:table-cell>
          <table:table-cell office:value-type="float" office:value="120">
            <text:p>1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AC106C4540334</text:p>
          </table:table-cell>
          <table:table-cell office:value-type="string">
            <text:p>dr5404 - Case Gaveta para HD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420">
            <text:p>4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9">
            <text:p>149</text:p>
          </table:table-cell>
          <table:table-cell/>
          <table:table-cell office:value-type="string">
            <text:p>dr5405 - Case ssd M.2 NVME USB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.5">
            <text:p>66.5</text:p>
          </table:table-cell>
          <table:table-cell office:value-type="float" office:value="140">
            <text:p>140</text:p>
          </table:table-cell>
          <table:table-cell office:value-type="float" office:value="66.5">
            <text:p>66.5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K53C4184M</text:p>
          </table:table-cell>
          <table:table-cell office:value-type="string">
            <text:p>dr8001 - SSD Nvme KingFast 256GB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9.5">
            <text:p>269.5</text:p>
          </table:table-cell>
          <table:table-cell office:value-type="float" office:value="350">
            <text:p>350</text:p>
          </table:table-cell>
          <table:table-cell office:value-type="float" office:value="269.5">
            <text:p>269.5</text:p>
          </table:table-cell>
          <table:table-cell office:value-type="float" office:value="350">
            <text:p>3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7898652410291</text:p>
          </table:table-cell>
          <table:table-cell office:value-type="string">
            <text:p>dv0001 - Caddy p/ segundo HD 12,7mm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AC050C3971286</text:p>
          </table:table-cell>
          <table:table-cell office:value-type="string">
            <text:p>dv0003 - Caddy p/ segundo HD 9,5mm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1236547980887</text:p>
          </table:table-cell>
          <table:table-cell office:value-type="string">
            <text:p>dv1605 - Gabinete aquario diversos</text:p>
          </table:table-cell>
          <table:table-cell/>
          <table:table-cell office:value-type="string">
            <text:p>Gabinet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320">
            <text:p>320</text:p>
          </table:table-cell>
          <table:table-cell office:value-type="float" office:value="350">
            <text:p>350</text:p>
          </table:table-cell>
          <table:table-cell office:value-type="float" office:value="640">
            <text:p>6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2014110608092</text:p>
          </table:table-cell>
          <table:table-cell office:value-type="string">
            <text:p>dv1808 - Luminaria usb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7897375169974</text:p>
          </table:table-cell>
          <table:table-cell office:value-type="string">
            <text:p>dv2108 - Conversor de HDMI para vga + audio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180">
            <text:p>1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7897711118093</text:p>
          </table:table-cell>
          <table:table-cell office:value-type="string">
            <text:p>dv2109 - Conversor USB 3.0  para HDMI FEMEA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20">
            <text:p>120</text:p>
          </table:table-cell>
          <table:table-cell office:value-type="float" office:value="57">
            <text:p>57</text:p>
          </table:table-cell>
          <table:table-cell office:value-type="float" office:value="120">
            <text:p>1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7899018446671</text:p>
          </table:table-cell>
          <table:table-cell office:value-type="string">
            <text:p>dv2221 - Suporte para TV de 14 a 84" Max 100kg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6">
            <text:p>236</text:p>
          </table:table-cell>
          <table:table-cell/>
          <table:table-cell office:value-type="string">
            <text:p>dv3231 - Pilha alcalina AA Pct com 2</text:p>
          </table:table-cell>
          <table:table-cell office:value-type="string">
            <text:p>elgin</text:p>
          </table:table-cell>
          <table:table-cell office:value-type="string">
            <text:p>Baterias e Carregador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20">
            <text:p>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1911641010661</text:p>
          </table:table-cell>
          <table:table-cell office:value-type="string">
            <text:p>dv4105 - Hub USB-C para 4 USB 3.0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em estoq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7898907620437</text:p>
          </table:table-cell>
          <table:table-cell office:value-type="string">
            <text:p>dv4208 - hub usb 4 portas simples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40">
            <text:p>40</text:p>
          </table:table-cell>
          <table:table-cell office:value-type="float" office:value="35.7">
            <text:p>35.7</text:p>
          </table:table-cell>
          <table:table-cell office:value-type="float" office:value="120">
            <text:p>1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6972737040069</text:p>
          </table:table-cell>
          <table:table-cell office:value-type="string">
            <text:p>dv5608 - Limpa tela 60ml com e sem pano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7899018416124</text:p>
          </table:table-cell>
          <table:table-cell office:value-type="string">
            <text:p>dv5909  - Organizador de fios e cabos 3 metros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7898605650194</text:p>
          </table:table-cell>
          <table:table-cell office:value-type="string">
            <text:p>dv6120 - 2 Organizadores de fios e cabos pequenos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5">
            <text:p>235</text:p>
          </table:table-cell>
          <table:table-cell/>
          <table:table-cell office:value-type="string">
            <text:p>dv6655 - Pilha alcalina AAA Pct com 2</text:p>
          </table:table-cell>
          <table:table-cell office:value-type="string">
            <text:p>elgin</text:p>
          </table:table-cell>
          <table:table-cell office:value-type="string">
            <text:p>Baterias e Carregador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20">
            <text:p>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7897013534195</text:p>
          </table:table-cell>
          <table:table-cell office:value-type="string">
            <text:p>dv7909 - Pilha Alcalina 2A custo unit. 3  venda minima 2 por 10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18">
            <text:p>18</text:p>
          </table:table-cell>
          <table:table-cell office:value-type="float" office:value="65.4">
            <text:p>65.4</text:p>
          </table:table-cell>
          <table:table-cell office:value-type="float" office:value="108">
            <text:p>108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7897013534218</text:p>
          </table:table-cell>
          <table:table-cell office:value-type="string">
            <text:p>dv7910 - Pilha Alcalina 3A  custo unit. 3  venda minima 2 por 10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18">
            <text:p>18</text:p>
          </table:table-cell>
          <table:table-cell office:value-type="float" office:value="21.8">
            <text:p>21.8</text:p>
          </table:table-cell>
          <table:table-cell office:value-type="float" office:value="36">
            <text:p>36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7897013553479</text:p>
          </table:table-cell>
          <table:table-cell office:value-type="string">
            <text:p>dv8080 - Pilha 12 volts  custo unit. 3  venda minima 2 por 10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7898566201497</text:p>
          </table:table-cell>
          <table:table-cell office:value-type="string">
            <text:p>dv8108 - Adaptadores Diversos P2 P10 duplicador + ext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1236187980887</text:p>
          </table:table-cell>
          <table:table-cell office:value-type="string">
            <text:p>dv8302 - Kit i3 3th CPU+ Placa+Cooler+gab+m2 ou ssd</text:p>
          </table:table-cell>
          <table:table-cell/>
          <table:table-cell office:value-type="string">
            <text:p>Comput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50">
            <text:p>850</text:p>
          </table:table-cell>
          <table:table-cell office:value-type="float" office:value="500">
            <text:p>500</text:p>
          </table:table-cell>
          <table:table-cell office:value-type="float" office:value="850">
            <text:p>8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5544018413253</text:p>
          </table:table-cell>
          <table:table-cell office:value-type="string">
            <text:p>dv8402 - kit placa mae cpu e gabinete</text:p>
          </table:table-cell>
          <table:table-cell/>
          <table:table-cell office:value-type="string">
            <text:p>Comput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990">
            <text:p>990</text:p>
          </table:table-cell>
          <table:table-cell office:value-type="float" office:value="750">
            <text:p>750</text:p>
          </table:table-cell>
          <table:table-cell office:value-type="float" office:value="990">
            <text:p>99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7908445429451</text:p>
          </table:table-cell>
          <table:table-cell office:value-type="string">
            <text:p>dv8506 - Placa de video gforce</text:p>
          </table:table-cell>
          <table:table-cell/>
          <table:table-cell office:value-type="string">
            <text:p>Placas de víde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50">
            <text:p>250</text:p>
          </table:table-cell>
          <table:table-cell office:value-type="float" office:value="110">
            <text:p>110</text:p>
          </table:table-cell>
          <table:table-cell office:value-type="float" office:value="250">
            <text:p>2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7898014301151</text:p>
          </table:table-cell>
          <table:table-cell office:value-type="string">
            <text:p>dv8509 - Suporte p/ notebook na cama ou sofá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4">
            <text:p>234</text:p>
          </table:table-cell>
          <table:table-cell/>
          <table:table-cell office:value-type="string">
            <text:p>dv8687 - Pilha alcalina AAA  Pct com 4</text:p>
          </table:table-cell>
          <table:table-cell office:value-type="string">
            <text:p>elgin</text:p>
          </table:table-cell>
          <table:table-cell office:value-type="string">
            <text:p>Baterias e Carregadores</text:p>
          </table:table-cell>
          <table:table-cell/>
          <table:table-cell office:value-type="string">
            <text:p>NOV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18">
            <text:p>18</text:p>
          </table:table-cell>
          <table:table-cell office:value-type="float" office:value="34.5">
            <text:p>34.5</text:p>
          </table:table-cell>
          <table:table-cell office:value-type="float" office:value="90">
            <text:p>9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7898378704308</text:p>
          </table:table-cell>
          <table:table-cell office:value-type="string">
            <text:p>dv8866 - Suporte para TV de 14 a 70" Max 100kg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3">
            <text:p>233</text:p>
          </table:table-cell>
          <table:table-cell/>
          <table:table-cell office:value-type="string">
            <text:p>dv9090 - Pilha alcalina AA Pct com 4</text:p>
          </table:table-cell>
          <table:table-cell office:value-type="string">
            <text:p>elgin</text:p>
          </table:table-cell>
          <table:table-cell office:value-type="string">
            <text:p>Baterias e Carregadores</text:p>
          </table:table-cell>
          <table:table-cell/>
          <table:table-cell office:value-type="string">
            <text:p>NOV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18">
            <text:p>18</text:p>
          </table:table-cell>
          <table:table-cell office:value-type="float" office:value="34.5">
            <text:p>34.5</text:p>
          </table:table-cell>
          <table:table-cell office:value-type="float" office:value="90">
            <text:p>9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7908639901497</text:p>
          </table:table-cell>
          <table:table-cell office:value-type="string">
            <text:p>en2402 - Fonte real pcwells 550 - 501 ou outra</text:p>
          </table:table-cell>
          <table:table-cell/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5.9">
            <text:p>95.9</text:p>
          </table:table-cell>
          <table:table-cell office:value-type="float" office:value="220">
            <text:p>220</text:p>
          </table:table-cell>
          <table:table-cell office:value-type="float" office:value="859.5">
            <text:p>859.5</text:p>
          </table:table-cell>
          <table:table-cell office:value-type="float" office:value="1980">
            <text:p>19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2250707000477</text:p>
          </table:table-cell>
          <table:table-cell office:value-type="string">
            <text:p>en2510 - Fonte comum kmex ou outra</text:p>
          </table:table-cell>
          <table:table-cell/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196">
            <text:p>196</text:p>
          </table:table-cell>
          <table:table-cell office:value-type="float" office:value="320">
            <text:p>3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7899018466396</text:p>
          </table:table-cell>
          <table:table-cell office:value-type="string">
            <text:p>en4208 - Filtro de linha 5, 6 ou 8 tomadas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7899018413253</text:p>
          </table:table-cell>
          <table:table-cell office:value-type="string">
            <text:p>en6411 - Extensao 3metros branco ou preto 3 pinos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35">
            <text:p>35</text:p>
          </table:table-cell>
          <table:table-cell office:value-type="float" office:value="60.3">
            <text:p>60.3</text:p>
          </table:table-cell>
          <table:table-cell office:value-type="float" office:value="105">
            <text:p>10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0">
            <text:p>280</text:p>
          </table:table-cell>
          <table:table-cell/>
          <table:table-cell office:value-type="string">
            <text:p>Fonte 200w Slim</text:p>
          </table:table-cell>
          <table:table-cell/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1">
            <text:p>281</text:p>
          </table:table-cell>
          <table:table-cell/>
          <table:table-cell office:value-type="string">
            <text:p>Fonte pk 550w</text:p>
          </table:table-cell>
          <table:table-cell/>
          <table:table-cell office:value-type="string">
            <text:p>Fontes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1">
            <text:p>251</text:p>
          </table:table-cell>
          <table:table-cell/>
          <table:table-cell office:value-type="string">
            <text:p>Fonte-Comum</text:p>
          </table:table-cell>
          <table:table-cell/>
          <table:table-cell office:value-type="string">
            <text:p>Fontes</text:p>
          </table:table-cell>
          <table:table-cell/>
          <table:table-cell office:value-type="string">
            <text:p>USAD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5">
            <text:p>255</text:p>
          </table:table-cell>
          <table:table-cell/>
          <table:table-cell office:value-type="string">
            <text:p>Gabinete Branco</text:p>
          </table:table-cell>
          <table:table-cell/>
          <table:table-cell office:value-type="string">
            <text:p>Gabinet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80">
            <text:p>280</text:p>
          </table:table-cell>
          <table:table-cell office:value-type="float" office:value="170">
            <text:p>170</text:p>
          </table:table-cell>
          <table:table-cell office:value-type="float" office:value="280">
            <text:p>2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7">
            <text:p>237</text:p>
          </table:table-cell>
          <table:table-cell/>
          <table:table-cell office:value-type="string">
            <text:p>Gabinete HP</text:p>
          </table:table-cell>
          <table:table-cell/>
          <table:table-cell office:value-type="string">
            <text:p>Gabinetes</text:p>
          </table:table-cell>
          <table:table-cell/>
          <table:table-cell office:value-type="string">
            <text:p>US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6">
            <text:p>256</text:p>
          </table:table-cell>
          <table:table-cell/>
          <table:table-cell office:value-type="string">
            <text:p>Gabinete Slim</text:p>
          </table:table-cell>
          <table:table-cell/>
          <table:table-cell office:value-type="string">
            <text:p>Gabinet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2">
            <text:p>252</text:p>
          </table:table-cell>
          <table:table-cell/>
          <table:table-cell office:value-type="string">
            <text:p>Gabinete Slim/ s fonte</text:p>
          </table:table-cell>
          <table:table-cell/>
          <table:table-cell office:value-type="string">
            <text:p>Gabinetes</text:p>
          </table:table-cell>
          <table:table-cell/>
          <table:table-cell office:value-type="string">
            <text:p>US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3">
            <text:p>253</text:p>
          </table:table-cell>
          <table:table-cell/>
          <table:table-cell office:value-type="string">
            <text:p>Gabinete Torre preto Amassado</text:p>
          </table:table-cell>
          <table:table-cell/>
          <table:table-cell office:value-type="string">
            <text:p>Gabinetes</text:p>
          </table:table-cell>
          <table:table-cell/>
          <table:table-cell office:value-type="string">
            <text:p>US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8">
            <text:p>238</text:p>
          </table:table-cell>
          <table:table-cell/>
          <table:table-cell office:value-type="string">
            <text:p>Gabinete Torre Preto antigos</text:p>
          </table:table-cell>
          <table:table-cell/>
          <table:table-cell office:value-type="string">
            <text:p>Gabinetes</text:p>
          </table:table-cell>
          <table:table-cell/>
          <table:table-cell office:value-type="string">
            <text:p>USAD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4">
            <text:p>254</text:p>
          </table:table-cell>
          <table:table-cell/>
          <table:table-cell office:value-type="string">
            <text:p>Gabinete Torre preto Nova</text:p>
          </table:table-cell>
          <table:table-cell/>
          <table:table-cell office:value-type="string">
            <text:p>Gabinetes</text:p>
          </table:table-cell>
          <table:table-cell/>
          <table:table-cell office:value-type="string">
            <text:p>NOV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840">
            <text:p>8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6">
            <text:p>276</text:p>
          </table:table-cell>
          <table:table-cell/>
          <table:table-cell office:value-type="string">
            <text:p>Hd 480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8">
            <text:p>248</text:p>
          </table:table-cell>
          <table:table-cell/>
          <table:table-cell office:value-type="string">
            <text:p>HD-160GB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US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7">
            <text:p>247</text:p>
          </table:table-cell>
          <table:table-cell/>
          <table:table-cell office:value-type="string">
            <text:p>HD-320GB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USAD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6">
            <text:p>246</text:p>
          </table:table-cell>
          <table:table-cell/>
          <table:table-cell office:value-type="string">
            <text:p>HD-80GB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USAD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8">
            <text:p>288</text:p>
          </table:table-cell>
          <table:table-cell/>
          <table:table-cell office:value-type="string">
            <text:p>i3 1ª</text:p>
          </table:table-cell>
          <table:table-cell/>
          <table:table-cell office:value-type="string">
            <text:p>Process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2">
            <text:p>142</text:p>
          </table:table-cell>
          <table:table-cell/>
          <table:table-cell office:value-type="string">
            <text:p>Itens usados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US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861.98">
            <text:p>10861.98</text:p>
          </table:table-cell>
          <table:table-cell office:value-type="float" office:value="10862">
            <text:p>10862</text:p>
          </table:table-cell>
          <table:table-cell office:value-type="float" office:value="10861.98">
            <text:p>10861.98</text:p>
          </table:table-cell>
          <table:table-cell office:value-type="float" office:value="10862">
            <text:p>10862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7">
            <text:p>277</text:p>
          </table:table-cell>
          <table:table-cell/>
          <table:table-cell office:value-type="string">
            <text:p>M2 128gb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8">
            <text:p>278</text:p>
          </table:table-cell>
          <table:table-cell/>
          <table:table-cell office:value-type="string">
            <text:p>M2 512gb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180">
            <text:p>180</text:p>
          </table:table-cell>
          <table:table-cell office:value-type="float" office:value="600">
            <text:p>6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7">
            <text:p>287</text:p>
          </table:table-cell>
          <table:table-cell/>
          <table:table-cell office:value-type="string">
            <text:p>M2 512gb Mini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2">
            <text:p>242</text:p>
          </table:table-cell>
          <table:table-cell/>
          <table:table-cell office:value-type="string">
            <text:p>Memoria DDR 1 1GB</text:p>
          </table:table-cell>
          <table:table-cell/>
          <table:table-cell office:value-type="string">
            <text:p>Memória RAM</text:p>
          </table:table-cell>
          <table:table-cell/>
          <table:table-cell office:value-type="string">
            <text:p>US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1">
            <text:p>241</text:p>
          </table:table-cell>
          <table:table-cell/>
          <table:table-cell office:value-type="string">
            <text:p>Memoria DDR 2 1GB</text:p>
          </table:table-cell>
          <table:table-cell/>
          <table:table-cell office:value-type="string">
            <text:p>Memória RAM</text:p>
          </table:table-cell>
          <table:table-cell/>
          <table:table-cell office:value-type="string">
            <text:p>USAD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0">
            <text:p>240</text:p>
          </table:table-cell>
          <table:table-cell/>
          <table:table-cell office:value-type="string">
            <text:p>Memoria DDR 2 2GB</text:p>
          </table:table-cell>
          <table:table-cell/>
          <table:table-cell office:value-type="string">
            <text:p>Memória RAM</text:p>
          </table:table-cell>
          <table:table-cell/>
          <table:table-cell office:value-type="string">
            <text:p>USAD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300">
            <text:p>3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5">
            <text:p>265</text:p>
          </table:table-cell>
          <table:table-cell/>
          <table:table-cell office:value-type="string">
            <text:p>Memoria ddr3 2gb</text:p>
          </table:table-cell>
          <table:table-cell/>
          <table:table-cell office:value-type="string">
            <text:p>Memória RAM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4">
            <text:p>264</text:p>
          </table:table-cell>
          <table:table-cell/>
          <table:table-cell office:value-type="string">
            <text:p>Memoria ddr3 4gb</text:p>
          </table:table-cell>
          <table:table-cell/>
          <table:table-cell office:value-type="string">
            <text:p>Memória RAM</text:p>
          </table:table-cell>
          <table:table-cell/>
          <table:table-cell office:value-type="string">
            <text:p>NOVA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650">
            <text:p>650</text:p>
          </table:table-cell>
          <table:table-cell office:value-type="float" office:value="1100">
            <text:p>11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7898456512321</text:p>
          </table:table-cell>
          <table:table-cell office:value-type="string">
            <text:p>mi5207 - Adaptador USB C para Micro USB Femea (V8)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5897431598721</text:p>
          </table:table-cell>
          <table:table-cell office:value-type="string">
            <text:p>mi5308 - Adaptador Micro SD - Miudesas (sem conferência)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54454987131</text:p>
          </table:table-cell>
          <table:table-cell office:value-type="string">
            <text:p>mi5408 - Adaptador  HDMI L 90°/ 270º ou direita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78454655316513673</text:p>
          </table:table-cell>
          <table:table-cell office:value-type="string">
            <text:p>mi5508 - Emenda P2 ou RCA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3">
            <text:p>143</text:p>
          </table:table-cell>
          <table:table-cell/>
          <table:table-cell office:value-type="string">
            <text:p>mi5708 - Bateria para PLM CMOS</text:p>
          </table:table-cell>
          <table:table-cell/>
          <table:table-cell office:value-type="string">
            <text:p>Baterias e Carregador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701150510686</text:p>
          </table:table-cell>
          <table:table-cell office:value-type="string">
            <text:p>mi5908 - SATA dados/força no pote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315">
            <text:p>31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15346984368</text:p>
          </table:table-cell>
          <table:table-cell office:value-type="string">
            <text:p>mi6109 - Pasta termica revenger no pote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5455866545455</text:p>
          </table:table-cell>
          <table:table-cell office:value-type="string">
            <text:p>mi6110 - Pasta termica silver seringa 1gr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7898456512326</text:p>
          </table:table-cell>
          <table:table-cell office:value-type="string">
            <text:p>mi6208 - Adaptador de som para note com USB-C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7898456525468</text:p>
          </table:table-cell>
          <table:table-cell office:value-type="string">
            <text:p>mi6312 - Adaptador DVI para VGA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8">
            <text:p>228</text:p>
          </table:table-cell>
          <table:table-cell/>
          <table:table-cell office:value-type="string">
            <text:p>mi6776 - Bateria para placa mãe  3v</text:p>
          </table:table-cell>
          <table:table-cell/>
          <table:table-cell office:value-type="string">
            <text:p>Baterias e Carregadores</text:p>
          </table:table-cell>
          <table:table-cell/>
          <table:table-cell office:value-type="string">
            <text:p>NOV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78">
            <text:p>1.78</text:p>
          </table:table-cell>
          <table:table-cell office:value-type="float" office:value="8">
            <text:p>8</text:p>
          </table:table-cell>
          <table:table-cell office:value-type="float" office:value="8.9">
            <text:p>8.9</text:p>
          </table:table-cell>
          <table:table-cell office:value-type="float" office:value="40">
            <text:p>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210026525468</text:p>
          </table:table-cell>
          <table:table-cell office:value-type="string">
            <text:p>mi6808 - HDMI x micro ou mini HDMI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898456512315</text:p>
          </table:table-cell>
          <table:table-cell office:value-type="string">
            <text:p>mi7008 - Leitor de cartão SD (de celular)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em estoq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23456545896865</text:p>
          </table:table-cell>
          <table:table-cell office:value-type="string">
            <text:p>mi7211 - Conector RJ45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7898456512317</text:p>
          </table:table-cell>
          <table:table-cell office:value-type="string">
            <text:p>mi7511 - Adaptador som p3 M x 2p2 F ou 2P2 M para P3 F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7898456512313</text:p>
          </table:table-cell>
          <table:table-cell office:value-type="string">
            <text:p>mi7708 - Adaptador de áudio P2-F x P10-M ou contrario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7908639900889</text:p>
          </table:table-cell>
          <table:table-cell office:value-type="string">
            <text:p>mu0101 - Caixa de som SP-40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7898555211193</text:p>
          </table:table-cell>
          <table:table-cell office:value-type="string">
            <text:p>mu0202 - Caixa de som SP-301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7908417104317</text:p>
          </table:table-cell>
          <table:table-cell office:value-type="string">
            <text:p>mu3207 - caixa som bluetooth 20w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7898594124799</text:p>
          </table:table-cell>
          <table:table-cell office:value-type="string">
            <text:p>mu3210 - caixa de som knup 3w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25">
            <text:p>21.25</text:p>
          </table:table-cell>
          <table:table-cell office:value-type="float" office:value="35">
            <text:p>35</text:p>
          </table:table-cell>
          <table:table-cell office:value-type="float" office:value="21.25">
            <text:p>21.25</text:p>
          </table:table-cell>
          <table:table-cell office:value-type="float" office:value="35">
            <text:p>3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7899718705641</text:p>
          </table:table-cell>
          <table:table-cell office:value-type="string">
            <text:p>mu3307 - apresentador laserpoint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7897372111600</text:p>
          </table:table-cell>
          <table:table-cell office:value-type="string">
            <text:p>mu3410 - adaptador bluetooth para carro ou caixa de som</text:p>
          </table:table-cell>
          <table:table-cell/>
          <table:table-cell office:value-type="string">
            <text:p>Cabos e Adaptadore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7897982201739</text:p>
          </table:table-cell>
          <table:table-cell office:value-type="string">
            <text:p>mu4005 - Headphone simples p2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7897372110627</text:p>
          </table:table-cell>
          <table:table-cell office:value-type="string">
            <text:p>mu4107 - Headphone P2 ou P3 medio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8552217749638</text:p>
          </table:table-cell>
          <table:table-cell office:value-type="string">
            <text:p>mu4712 - USB Virtual 7.1 Channel Sound Adapter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7898506455713</text:p>
          </table:table-cell>
          <table:table-cell office:value-type="string">
            <text:p>mu5009 - webcam multilaser</text:p>
          </table:table-cell>
          <table:table-cell/>
          <table:table-cell office:value-type="string">
            <text:p>Periféric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9">
            <text:p>26.9</text:p>
          </table:table-cell>
          <table:table-cell office:value-type="float" office:value="80">
            <text:p>80</text:p>
          </table:table-cell>
          <table:table-cell office:value-type="float" office:value="26.9">
            <text:p>26.9</text:p>
          </table:table-cell>
          <table:table-cell office:value-type="float" office:value="80">
            <text:p>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6932445280317</text:p>
          </table:table-cell>
          <table:table-cell office:value-type="string">
            <text:p>mu5452 - Fone de ouvido Simples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em estoq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2010000001127</text:p>
          </table:table-cell>
          <table:table-cell office:value-type="string">
            <text:p>mu7879 - Adaptador Bluetooth Mini Usb</text:p>
          </table:table-cell>
          <table:table-cell/>
          <table:table-cell office:value-type="string">
            <text:p>Acessórios</text:p>
          </table:table-cell>
          <table:table-cell office:value-type="string">
            <text:p>Adaptador</text:p>
          </table:table-cell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9">
            <text:p>21.9</text:p>
          </table:table-cell>
          <table:table-cell office:value-type="float" office:value="55">
            <text:p>55</text:p>
          </table:table-cell>
          <table:table-cell office:value-type="float" office:value="43.8">
            <text:p>43.8</text:p>
          </table:table-cell>
          <table:table-cell office:value-type="float" office:value="110">
            <text:p>11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7898718960463</text:p>
          </table:table-cell>
          <table:table-cell office:value-type="string">
            <text:p>mu8976 - Fone de ouvido Stereo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6971542158266</text:p>
          </table:table-cell>
          <table:table-cell office:value-type="string">
            <text:p>mu9226 - Microfone de lapela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2">
            <text:p>262</text:p>
          </table:table-cell>
          <table:table-cell/>
          <table:table-cell office:value-type="string">
            <text:p>Placa mãe	am3</text:p>
          </table:table-cell>
          <table:table-cell/>
          <table:table-cell office:value-type="string">
            <text:p>Placas-mãe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9">
            <text:p>259</text:p>
          </table:table-cell>
          <table:table-cell/>
          <table:table-cell office:value-type="string">
            <text:p>Placa mãe	Asus H61</text:p>
          </table:table-cell>
          <table:table-cell/>
          <table:table-cell office:value-type="string">
            <text:p>Placas-mãe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1">
            <text:p>261</text:p>
          </table:table-cell>
          <table:table-cell/>
          <table:table-cell office:value-type="string">
            <text:p>Placa mãe	b75bu</text:p>
          </table:table-cell>
          <table:table-cell/>
          <table:table-cell office:value-type="string">
            <text:p>Placas-mãe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8">
            <text:p>258</text:p>
          </table:table-cell>
          <table:table-cell/>
          <table:table-cell office:value-type="string">
            <text:p>Placa mãe	ga55hm</text:p>
          </table:table-cell>
          <table:table-cell/>
          <table:table-cell office:value-type="string">
            <text:p>Placas-mãe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7">
            <text:p>257</text:p>
          </table:table-cell>
          <table:table-cell/>
          <table:table-cell office:value-type="string">
            <text:p>Placa mãe	H61</text:p>
          </table:table-cell>
          <table:table-cell/>
          <table:table-cell office:value-type="string">
            <text:p>Placas-mãe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3">
            <text:p>263</text:p>
          </table:table-cell>
          <table:table-cell/>
          <table:table-cell office:value-type="string">
            <text:p>Placa mãe	H81 nova</text:p>
          </table:table-cell>
          <table:table-cell/>
          <table:table-cell office:value-type="string">
            <text:p>Placas-mãe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0">
            <text:p>260</text:p>
          </table:table-cell>
          <table:table-cell/>
          <table:table-cell office:value-type="string">
            <text:p>Placa mãe	M2n68</text:p>
          </table:table-cell>
          <table:table-cell/>
          <table:table-cell office:value-type="string">
            <text:p>Placas-mãe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9">
            <text:p>239</text:p>
          </table:table-cell>
          <table:table-cell/>
          <table:table-cell office:value-type="string">
            <text:p>Placa mãe 775</text:p>
          </table:table-cell>
          <table:table-cell/>
          <table:table-cell office:value-type="string">
            <text:p>Placas-mãe</text:p>
          </table:table-cell>
          <table:table-cell/>
          <table:table-cell office:value-type="string">
            <text:p>USADA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810">
            <text:p>81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7890465916090</text:p>
          </table:table-cell>
          <table:table-cell office:value-type="string">
            <text:p>re2301 - Adaptador USB Wifi 600Mbps Dual Generico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9">
            <text:p>33.9</text:p>
          </table:table-cell>
          <table:table-cell office:value-type="float" office:value="80">
            <text:p>80</text:p>
          </table:table-cell>
          <table:table-cell office:value-type="float" office:value="181.7">
            <text:p>181.7</text:p>
          </table:table-cell>
          <table:table-cell office:value-type="float" office:value="400">
            <text:p>4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6935364050511</text:p>
          </table:table-cell>
          <table:table-cell office:value-type="string">
            <text:p>re2409 - placa de rede tplink 150mpbs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.74">
            <text:p>48.74</text:p>
          </table:table-cell>
          <table:table-cell office:value-type="float" office:value="85">
            <text:p>85</text:p>
          </table:table-cell>
          <table:table-cell office:value-type="float" office:value="48.74">
            <text:p>48.74</text:p>
          </table:table-cell>
          <table:table-cell office:value-type="float" office:value="85">
            <text:p>8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7908552005692</text:p>
          </table:table-cell>
          <table:table-cell office:value-type="string">
            <text:p>re2701 - adaptador USB para wifi com antena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7908552000475</text:p>
          </table:table-cell>
          <table:table-cell office:value-type="string">
            <text:p>re3322 - Placa de rede Knup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1">
            <text:p>151</text:p>
          </table:table-cell>
          <table:table-cell/>
          <table:table-cell office:value-type="string">
            <text:p>re5566 - Conector RJ45 CAT 6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0">
            <text:p>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0">
            <text:p>150</text:p>
          </table:table-cell>
          <table:table-cell/>
          <table:table-cell office:value-type="string">
            <text:p>re5577 - Conector rj45 CAT 5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2">
            <text:p>2</text:p>
          </table:table-cell>
          <table:table-cell office:value-type="float" office:value="2.9">
            <text:p>2.9</text:p>
          </table:table-cell>
          <table:table-cell office:value-type="float" office:value="20">
            <text:p>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6290132556146</text:p>
          </table:table-cell>
          <table:table-cell office:value-type="string">
            <text:p>re6699 - Placa PCI /100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7898652416316</text:p>
          </table:table-cell>
          <table:table-cell office:value-type="string">
            <text:p>re7744 - Placa wifi Knup</text:p>
          </table:table-cell>
          <table:table-cell/>
          <table:table-cell office:value-type="string">
            <text:p>Redes e Wireles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9">
            <text:p>289</text:p>
          </table:table-cell>
          <table:table-cell/>
          <table:table-cell office:value-type="string">
            <text:p>ssd 480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80">
            <text:p>480</text:p>
          </table:table-cell>
          <table:table-cell office:value-type="float" office:value="350">
            <text:p>350</text:p>
          </table:table-cell>
          <table:table-cell office:value-type="float" office:value="480">
            <text:p>4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0">
            <text:p>250</text:p>
          </table:table-cell>
          <table:table-cell/>
          <table:table-cell office:value-type="string">
            <text:p>SSD-120GB</text:p>
          </table:table-cell>
          <table:table-cell/>
          <table:table-cell office:value-type="string">
            <text:p>Armazenamento</text:p>
          </table:table-cell>
          <table:table-cell/>
          <table:table-cell office:value-type="string">
            <text:p>USAD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720">
            <text:p>7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16960219</text:p>
          </table:table-cell>
          <table:table-cell office:value-type="string">
            <text:p>tm2111 - Mouse pad diversos bichos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7908727607768</text:p>
          </table:table-cell>
          <table:table-cell office:value-type="string">
            <text:p>tm2209 - mousepad simples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15">
            <text:p>15</text:p>
          </table:table-cell>
          <table:table-cell office:value-type="float" office:value="3.7">
            <text:p>3.7</text:p>
          </table:table-cell>
          <table:table-cell office:value-type="float" office:value="15">
            <text:p>1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7898555210769</text:p>
          </table:table-cell>
          <table:table-cell office:value-type="string">
            <text:p>tm2508 - Mouse usb generico ou c3 multilaser</text:p>
          </table:table-cell>
          <table:table-cell/>
          <table:table-cell office:value-type="string">
            <text:p>Periféric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97855205681</text:p>
          </table:table-cell>
          <table:table-cell office:value-type="string">
            <text:p>tm2609 - Mouse logitech com fio m90</text:p>
          </table:table-cell>
          <table:table-cell/>
          <table:table-cell office:value-type="string">
            <text:p>Periféric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7897975015701</text:p>
          </table:table-cell>
          <table:table-cell office:value-type="string">
            <text:p>tm3809 - Teclado + mouse s/fio MAX PRINT  preto</text:p>
          </table:table-cell>
          <table:table-cell/>
          <table:table-cell office:value-type="string">
            <text:p>Periféric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7898555213661</text:p>
          </table:table-cell>
          <table:table-cell office:value-type="string">
            <text:p>tm3909 - Kit Teclado +mouse C3tech sem fio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float" office:value="240">
            <text:p>2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7898555210783</text:p>
          </table:table-cell>
          <table:table-cell office:value-type="string">
            <text:p>tm3940 -  Teclado s/ fio C3Tech c/ touchpad</text:p>
          </table:table-cell>
          <table:table-cell/>
          <table:table-cell office:value-type="string">
            <text:p>Periféric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7908347902793</text:p>
          </table:table-cell>
          <table:table-cell office:value-type="string">
            <text:p>tm4207 - Kit gamer (teclado+ mouse e pad)</text:p>
          </table:table-cell>
          <table:table-cell/>
          <table:table-cell office:value-type="string">
            <text:p>Periféric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7897975084707</text:p>
          </table:table-cell>
          <table:table-cell office:value-type="string">
            <text:p>tm4311 - apoio para punho</text:p>
          </table:table-cell>
          <table:table-cell/>
          <table:table-cell office:value-type="string">
            <text:p>Acessórios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75">
            <text:p>75</text:p>
          </table:table-cell>
          <table:table-cell office:value-type="float" office:value="49.5">
            <text:p>49.5</text:p>
          </table:table-cell>
          <table:table-cell office:value-type="float" office:value="75">
            <text:p>75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3">
            <text:p>223</text:p>
          </table:table-cell>
          <table:table-cell/>
          <table:table-cell office:value-type="string">
            <text:p>tm6677 - Mouse sem fio Targus</text:p>
          </table:table-cell>
          <table:table-cell/>
          <table:table-cell office:value-type="string">
            <text:p>Periféric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float" office:value="45">
            <text:p>45</text:p>
          </table:table-cell>
          <table:table-cell office:value-type="float" office:value="27.2">
            <text:p>27.2</text:p>
          </table:table-cell>
          <table:table-cell office:value-type="float" office:value="90">
            <text:p>9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4">
            <text:p>224</text:p>
          </table:table-cell>
          <table:table-cell/>
          <table:table-cell office:value-type="string">
            <text:p>tm8787 - Mouse sem fio Multilaser</text:p>
          </table:table-cell>
          <table:table-cell/>
          <table:table-cell office:value-type="string">
            <text:p>Periféric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9">
            <text:p>14.9</text:p>
          </table:table-cell>
          <table:table-cell office:value-type="float" office:value="50">
            <text:p>50</text:p>
          </table:table-cell>
          <table:table-cell office:value-type="float" office:value="29.8">
            <text:p>29.8</text:p>
          </table:table-cell>
          <table:table-cell office:value-type="float" office:value="100">
            <text:p>1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4">
            <text:p>144</text:p>
          </table:table-cell>
          <table:table-cell/>
          <table:table-cell office:value-type="string">
            <text:p>Tm8877- Teclado com fio C3 Tech</text:p>
          </table:table-cell>
          <table:table-cell office:value-type="string">
            <text:p>C3 Tech</text:p>
          </table:table-cell>
          <table:table-cell office:value-type="string">
            <text:p>Periféricos</text:p>
          </table:table-cell>
          <table:table-cell/>
          <table:table-cell office:value-type="string">
            <text:p>NOV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180">
            <text:p>18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5">
            <text:p>225</text:p>
          </table:table-cell>
          <table:table-cell/>
          <table:table-cell office:value-type="string">
            <text:p>tm9987 - Mouse sem fio C3TECH Preto</text:p>
          </table:table-cell>
          <table:table-cell/>
          <table:table-cell office:value-type="string">
            <text:p>Periféricos</text:p>
          </table:table-cell>
          <table:table-cell/>
          <table:table-cell office:value-type="string">
            <text:p>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4">
            <text:p>284</text:p>
          </table:table-cell>
          <table:table-cell/>
          <table:table-cell office:value-type="string">
            <text:p>VGA GT 1030 Nvidia 2GB</text:p>
          </table:table-cell>
          <table:table-cell/>
          <table:table-cell office:value-type="string">
            <text:p>Placas de vídeo</text:p>
          </table:table-cell>
          <table:table-cell/>
          <table:table-cell office:value-type="string">
            <text:p>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9.97">
            <text:p>249.97</text:p>
          </table:table-cell>
          <table:table-cell office:value-type="float" office:value="500">
            <text:p>500</text:p>
          </table:table-cell>
          <table:table-cell office:value-type="float" office:value="70">
            <text:p>70</text:p>
          </table:table-cell>
          <table:table-cell office:value-type="float" office:value="500">
            <text:p>500</text:p>
          </table:table-cell>
          <table:table-cell office:value-type="string">
            <text:p>Saudav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Reposicoes">
        <table:table-row>
          <table:table-cell office:value-type="string">
            <text:p>id</text:p>
          </table:table-cell>
          <table:table-cell office:value-type="string">
            <text:p>data</text:p>
          </table:table-cell>
          <table:table-cell office:value-type="string">
            <text:p>descricao</text:p>
          </table:table-cell>
          <table:table-cell office:value-type="string">
            <text:p>valor</text:p>
          </table:table-cell>
          <table:table-cell office:value-type="string">
            <text:p>workbook_origem</text:p>
          </table:table-cell>
          <table:table-cell office:value-type="string">
            <text:p>aba_origem</text:p>
          </table:table-cell>
          <table:table-cell office:value-type="string">
            <text:p>linha_origem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2026-04-30</text:p>
          </table:table-cell>
          <table:table-cell office:value-type="string">
            <text:p>Estoque inicial: ssd 480 (Qtd: 1)</text:p>
          </table:table-cell>
          <table:table-cell office:value-type="float" office:value="350">
            <text:p>350</text:p>
          </table:table-cell>
          <table:table-cell/>
          <table:table-cell/>
          <table:table-cell/>
        </table:table-row>
        <table:table-row>
          <table:table-cell office:value-type="float" office:value="307">
            <text:p>307</text:p>
          </table:table-cell>
          <table:table-cell office:value-type="string">
            <text:p>2026-04-30</text:p>
          </table:table-cell>
          <table:table-cell office:value-type="string">
            <text:p>Estoque inicial: i3 1ª (Qtd: 1)</text:p>
          </table:table-cell>
          <table:table-cell office:value-type="float" office:value="30">
            <text:p>30</text:p>
          </table:table-cell>
          <table:table-cell/>
          <table:table-cell/>
          <table:table-cell/>
        </table:table-row>
        <table:table-row>
          <table:table-cell office:value-type="float" office:value="306">
            <text:p>306</text:p>
          </table:table-cell>
          <table:table-cell office:value-type="string">
            <text:p>2026-04-30</text:p>
          </table:table-cell>
          <table:table-cell office:value-type="string">
            <text:p>Estoque inicial: M2 512gb Mini (Qtd: 1)</text:p>
          </table:table-cell>
          <table:table-cell office:value-type="float" office:value="400">
            <text:p>400</text:p>
          </table:table-cell>
          <table:table-cell/>
          <table:table-cell/>
          <table:table-cell/>
        </table:table-row>
        <table:table-row>
          <table:table-cell office:value-type="float" office:value="305">
            <text:p>305</text:p>
          </table:table-cell>
          <table:table-cell office:value-type="string">
            <text:p>2026-04-30</text:p>
          </table:table-cell>
          <table:table-cell office:value-type="string">
            <text:p>Estoque inicial: Cooler 20 cm (Qtd: 1)</text:p>
          </table:table-cell>
          <table:table-cell office:value-type="float" office:value="40">
            <text:p>40</text:p>
          </table:table-cell>
          <table:table-cell/>
          <table:table-cell/>
          <table:table-cell/>
        </table:table-row>
        <table:table-row>
          <table:table-cell office:value-type="float" office:value="304">
            <text:p>304</text:p>
          </table:table-cell>
          <table:table-cell office:value-type="string">
            <text:p>2026-04-30</text:p>
          </table:table-cell>
          <table:table-cell office:value-type="string">
            <text:p>Estoque inicial: Cooler 12 cm (Qtd: 1)</text:p>
          </table:table-cell>
          <table:table-cell office:value-type="float" office:value="15">
            <text:p>15</text:p>
          </table:table-cell>
          <table:table-cell/>
          <table:table-cell/>
          <table:table-cell/>
        </table:table-row>
        <table:table-row>
          <table:table-cell office:value-type="float" office:value="303">
            <text:p>303</text:p>
          </table:table-cell>
          <table:table-cell office:value-type="string">
            <text:p>2026-04-28</text:p>
          </table:table-cell>
          <table:table-cell office:value-type="string">
            <text:p>Estoque inicial: VGA GT 1030 Nvidia 2GB (Qtd: 1)</text:p>
          </table:table-cell>
          <table:table-cell office:value-type="float" office:value="70">
            <text:p>70</text:p>
          </table:table-cell>
          <table:table-cell/>
          <table:table-cell/>
          <table:table-cell/>
        </table:table-row>
        <table:table-row>
          <table:table-cell office:value-type="float" office:value="300">
            <text:p>300</text:p>
          </table:table-cell>
          <table:table-cell office:value-type="string">
            <text:p>2026-04-28</text:p>
          </table:table-cell>
          <table:table-cell office:value-type="string">
            <text:p>Estoque inicial: Fonte pk 550w (Qtd: 3)</text:p>
          </table:table-cell>
          <table:table-cell office:value-type="float" office:value="300">
            <text:p>300</text:p>
          </table:table-cell>
          <table:table-cell/>
          <table:table-cell/>
          <table:table-cell/>
        </table:table-row>
        <table:table-row>
          <table:table-cell office:value-type="float" office:value="299">
            <text:p>299</text:p>
          </table:table-cell>
          <table:table-cell office:value-type="string">
            <text:p>2026-04-28</text:p>
          </table:table-cell>
          <table:table-cell office:value-type="string">
            <text:p>Estoque inicial: Fonte 200w Slim (Qtd: 2)</text:p>
          </table:table-cell>
          <table:table-cell office:value-type="float" office:value="120">
            <text:p>120</text:p>
          </table:table-cell>
          <table:table-cell/>
          <table:table-cell/>
          <table:table-cell/>
        </table:table-row>
        <table:table-row>
          <table:table-cell office:value-type="float" office:value="297">
            <text:p>297</text:p>
          </table:table-cell>
          <table:table-cell office:value-type="string">
            <text:p>2026-04-28</text:p>
          </table:table-cell>
          <table:table-cell office:value-type="string">
            <text:p>Estoque inicial: M2 512gb (Qtd: 1)</text:p>
          </table:table-cell>
          <table:table-cell office:value-type="float" office:value="180">
            <text:p>180</text:p>
          </table:table-cell>
          <table:table-cell/>
          <table:table-cell/>
          <table:table-cell/>
        </table:table-row>
        <table:table-row>
          <table:table-cell office:value-type="float" office:value="296">
            <text:p>296</text:p>
          </table:table-cell>
          <table:table-cell office:value-type="string">
            <text:p>2026-04-28</text:p>
          </table:table-cell>
          <table:table-cell office:value-type="string">
            <text:p>Estoque inicial: M2 128gb (Qtd: 1)</text:p>
          </table:table-cell>
          <table:table-cell office:value-type="float" office:value="135">
            <text:p>135</text:p>
          </table:table-cell>
          <table:table-cell/>
          <table:table-cell/>
          <table:table-cell/>
        </table:table-row>
        <table:table-row>
          <table:table-cell office:value-type="float" office:value="295">
            <text:p>295</text:p>
          </table:table-cell>
          <table:table-cell office:value-type="string">
            <text:p>2026-04-28</text:p>
          </table:table-cell>
          <table:table-cell office:value-type="string">
            <text:p>Estoque inicial: Hd 480 (Qtd: 1)</text:p>
          </table:table-cell>
          <table:table-cell office:value-type="float" office:value="60">
            <text:p>60</text:p>
          </table:table-cell>
          <table:table-cell/>
          <table:table-cell/>
          <table:table-cell/>
        </table:table-row>
        <table:table-row>
          <table:table-cell office:value-type="float" office:value="292">
            <text:p>292</text:p>
          </table:table-cell>
          <table:table-cell office:value-type="string">
            <text:p>2026-04-28</text:p>
          </table:table-cell>
          <table:table-cell office:value-type="string">
            <text:p>Estoque inicial: CPU I5 4ª (Qtd: 1)</text:p>
          </table:table-cell>
          <table:table-cell office:value-type="float" office:value="100">
            <text:p>100</text:p>
          </table:table-cell>
          <table:table-cell/>
          <table:table-cell/>
          <table:table-cell/>
        </table:table-row>
        <table:table-row>
          <table:table-cell office:value-type="float" office:value="291">
            <text:p>291</text:p>
          </table:table-cell>
          <table:table-cell office:value-type="string">
            <text:p>2026-04-28</text:p>
          </table:table-cell>
          <table:table-cell office:value-type="string">
            <text:p>Estoque inicial: CPU amd fx (Qtd: 1)</text:p>
          </table:table-cell>
          <table:table-cell office:value-type="float" office:value="100">
            <text:p>100</text:p>
          </table:table-cell>
          <table:table-cell/>
          <table:table-cell/>
          <table:table-cell/>
        </table:table-row>
        <table:table-row>
          <table:table-cell office:value-type="float" office:value="290">
            <text:p>290</text:p>
          </table:table-cell>
          <table:table-cell office:value-type="string">
            <text:p>2026-04-28</text:p>
          </table:table-cell>
          <table:table-cell office:value-type="string">
            <text:p>Estoque inicial: CPU i3 3ª (Qtd: 2)</text:p>
          </table:table-cell>
          <table:table-cell office:value-type="float" office:value="100">
            <text:p>100</text:p>
          </table:table-cell>
          <table:table-cell/>
          <table:table-cell/>
          <table:table-cell/>
        </table:table-row>
        <table:table-row>
          <table:table-cell office:value-type="float" office:value="289">
            <text:p>289</text:p>
          </table:table-cell>
          <table:table-cell office:value-type="string">
            <text:p>2026-04-28</text:p>
          </table:table-cell>
          <table:table-cell office:value-type="string">
            <text:p>Estoque inicial: CPU I5 3ª (Qtd: 1)</text:p>
          </table:table-cell>
          <table:table-cell office:value-type="float" office:value="90">
            <text:p>90</text:p>
          </table:table-cell>
          <table:table-cell/>
          <table:table-cell/>
          <table:table-cell/>
        </table:table-row>
        <table:table-row>
          <table:table-cell office:value-type="float" office:value="288">
            <text:p>288</text:p>
          </table:table-cell>
          <table:table-cell office:value-type="string">
            <text:p>2026-04-28</text:p>
          </table:table-cell>
          <table:table-cell office:value-type="string">
            <text:p>Estoque inicial: CPU i3 2ª (Qtd: 1)</text:p>
          </table:table-cell>
          <table:table-cell office:value-type="float" office:value="40">
            <text:p>40</text:p>
          </table:table-cell>
          <table:table-cell/>
          <table:table-cell/>
          <table:table-cell/>
        </table:table-row>
        <table:table-row>
          <table:table-cell office:value-type="float" office:value="287">
            <text:p>287</text:p>
          </table:table-cell>
          <table:table-cell office:value-type="string">
            <text:p>2026-04-28</text:p>
          </table:table-cell>
          <table:table-cell office:value-type="string">
            <text:p>Estoque inicial: CPU i5 2ª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286">
            <text:p>286</text:p>
          </table:table-cell>
          <table:table-cell office:value-type="string">
            <text:p>2026-04-28</text:p>
          </table:table-cell>
          <table:table-cell office:value-type="string">
            <text:p>Estoque inicial: CPU Intel G2030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285">
            <text:p>285</text:p>
          </table:table-cell>
          <table:table-cell office:value-type="string">
            <text:p>2026-04-28</text:p>
          </table:table-cell>
          <table:table-cell office:value-type="string">
            <text:p>Estoque inicial: CPU AMD Athon (Qtd: 1)</text:p>
          </table:table-cell>
          <table:table-cell office:value-type="float" office:value="30">
            <text:p>30</text:p>
          </table:table-cell>
          <table:table-cell/>
          <table:table-cell/>
          <table:table-cell/>
        </table:table-row>
        <table:table-row>
          <table:table-cell office:value-type="float" office:value="284">
            <text:p>284</text:p>
          </table:table-cell>
          <table:table-cell office:value-type="string">
            <text:p>2026-04-28</text:p>
          </table:table-cell>
          <table:table-cell office:value-type="string">
            <text:p>Estoque inicial: Memoria ddr3 2gb (Qtd: 6)</text:p>
          </table:table-cell>
          <table:table-cell office:value-type="float" office:value="180">
            <text:p>180</text:p>
          </table:table-cell>
          <table:table-cell/>
          <table:table-cell/>
          <table:table-cell/>
        </table:table-row>
        <table:table-row>
          <table:table-cell office:value-type="float" office:value="283">
            <text:p>283</text:p>
          </table:table-cell>
          <table:table-cell office:value-type="string">
            <text:p>2026-04-28</text:p>
          </table:table-cell>
          <table:table-cell office:value-type="string">
            <text:p>Estoque inicial: Memoria ddr3 4gb (Qtd: 9)</text:p>
          </table:table-cell>
          <table:table-cell office:value-type="float" office:value="585">
            <text:p>585</text:p>
          </table:table-cell>
          <table:table-cell/>
          <table:table-cell/>
          <table:table-cell/>
        </table:table-row>
        <table:table-row>
          <table:table-cell office:value-type="float" office:value="282">
            <text:p>282</text:p>
          </table:table-cell>
          <table:table-cell office:value-type="string">
            <text:p>2026-04-28</text:p>
          </table:table-cell>
          <table:table-cell office:value-type="string">
            <text:p>Estoque inicial: Placa mãe	H81 nova (Qtd: 1)</text:p>
          </table:table-cell>
          <table:table-cell office:value-type="float" office:value="90">
            <text:p>90</text:p>
          </table:table-cell>
          <table:table-cell/>
          <table:table-cell/>
          <table:table-cell/>
        </table:table-row>
        <table:table-row>
          <table:table-cell office:value-type="float" office:value="281">
            <text:p>281</text:p>
          </table:table-cell>
          <table:table-cell office:value-type="string">
            <text:p>2026-04-28</text:p>
          </table:table-cell>
          <table:table-cell office:value-type="string">
            <text:p>Estoque inicial: Placa mãe	am3 (Qtd: 1)</text:p>
          </table:table-cell>
          <table:table-cell office:value-type="float" office:value="100">
            <text:p>100</text:p>
          </table:table-cell>
          <table:table-cell/>
          <table:table-cell/>
          <table:table-cell/>
        </table:table-row>
        <table:table-row>
          <table:table-cell office:value-type="float" office:value="280">
            <text:p>280</text:p>
          </table:table-cell>
          <table:table-cell office:value-type="string">
            <text:p>2026-04-28</text:p>
          </table:table-cell>
          <table:table-cell office:value-type="string">
            <text:p>Estoque inicial: Placa mãe	b75bu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279">
            <text:p>279</text:p>
          </table:table-cell>
          <table:table-cell office:value-type="string">
            <text:p>2026-04-28</text:p>
          </table:table-cell>
          <table:table-cell office:value-type="string">
            <text:p>Estoque inicial: Placa mãe	M2n68 (Qtd: 1)</text:p>
          </table:table-cell>
          <table:table-cell office:value-type="float" office:value="100">
            <text:p>100</text:p>
          </table:table-cell>
          <table:table-cell/>
          <table:table-cell/>
          <table:table-cell/>
        </table:table-row>
        <table:table-row>
          <table:table-cell office:value-type="float" office:value="278">
            <text:p>278</text:p>
          </table:table-cell>
          <table:table-cell office:value-type="string">
            <text:p>2026-04-28</text:p>
          </table:table-cell>
          <table:table-cell office:value-type="string">
            <text:p>Estoque inicial: Placa mãe	Asus H61 (Qtd: 1)</text:p>
          </table:table-cell>
          <table:table-cell office:value-type="float" office:value="50">
            <text:p>50</text:p>
          </table:table-cell>
          <table:table-cell/>
          <table:table-cell/>
          <table:table-cell/>
        </table:table-row>
        <table:table-row>
          <table:table-cell office:value-type="float" office:value="277">
            <text:p>277</text:p>
          </table:table-cell>
          <table:table-cell office:value-type="string">
            <text:p>2026-04-28</text:p>
          </table:table-cell>
          <table:table-cell office:value-type="string">
            <text:p>Estoque inicial: Placa mãe	ga55hm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276">
            <text:p>276</text:p>
          </table:table-cell>
          <table:table-cell office:value-type="string">
            <text:p>2026-04-28</text:p>
          </table:table-cell>
          <table:table-cell office:value-type="string">
            <text:p>Estoque inicial: Placa mãe	H61 (Qtd: 4)</text:p>
          </table:table-cell>
          <table:table-cell office:value-type="float" office:value="320">
            <text:p>320</text:p>
          </table:table-cell>
          <table:table-cell/>
          <table:table-cell/>
          <table:table-cell/>
        </table:table-row>
        <table:table-row>
          <table:table-cell office:value-type="float" office:value="275">
            <text:p>275</text:p>
          </table:table-cell>
          <table:table-cell office:value-type="string">
            <text:p>2026-04-28</text:p>
          </table:table-cell>
          <table:table-cell office:value-type="string">
            <text:p>Estoque inicial: Gabinete Slim (Qtd: 2)</text:p>
          </table:table-cell>
          <table:table-cell office:value-type="float" office:value="140">
            <text:p>140</text:p>
          </table:table-cell>
          <table:table-cell/>
          <table:table-cell/>
          <table:table-cell/>
        </table:table-row>
        <table:table-row>
          <table:table-cell office:value-type="float" office:value="274">
            <text:p>274</text:p>
          </table:table-cell>
          <table:table-cell office:value-type="string">
            <text:p>2026-04-28</text:p>
          </table:table-cell>
          <table:table-cell office:value-type="string">
            <text:p>Estoque inicial: Gabinete Branco (Qtd: 1)</text:p>
          </table:table-cell>
          <table:table-cell office:value-type="float" office:value="170">
            <text:p>170</text:p>
          </table:table-cell>
          <table:table-cell/>
          <table:table-cell/>
          <table:table-cell/>
        </table:table-row>
        <table:table-row>
          <table:table-cell office:value-type="float" office:value="273">
            <text:p>273</text:p>
          </table:table-cell>
          <table:table-cell office:value-type="string">
            <text:p>2026-04-28</text:p>
          </table:table-cell>
          <table:table-cell office:value-type="string">
            <text:p>Estoque inicial: Gabinete Torre preto Nova (Qtd: 6)</text:p>
          </table:table-cell>
          <table:table-cell office:value-type="float" office:value="420">
            <text:p>420</text:p>
          </table:table-cell>
          <table:table-cell/>
          <table:table-cell/>
          <table:table-cell/>
        </table:table-row>
        <table:table-row>
          <table:table-cell office:value-type="float" office:value="272">
            <text:p>272</text:p>
          </table:table-cell>
          <table:table-cell office:value-type="string">
            <text:p>2026-04-28</text:p>
          </table:table-cell>
          <table:table-cell office:value-type="string">
            <text:p>Estoque inicial: Gabinete Torre preto Amassado (Qtd: 1)</text:p>
          </table:table-cell>
          <table:table-cell office:value-type="float" office:value="30">
            <text:p>30</text:p>
          </table:table-cell>
          <table:table-cell/>
          <table:table-cell/>
          <table:table-cell/>
        </table:table-row>
        <table:table-row>
          <table:table-cell office:value-type="float" office:value="271">
            <text:p>271</text:p>
          </table:table-cell>
          <table:table-cell office:value-type="string">
            <text:p>2026-04-27</text:p>
          </table:table-cell>
          <table:table-cell office:value-type="string">
            <text:p>Estoque inicial: Gabinete Slim/ s fonte (Qtd: 1)</text:p>
          </table:table-cell>
          <table:table-cell office:value-type="float" office:value="30">
            <text:p>30</text:p>
          </table:table-cell>
          <table:table-cell/>
          <table:table-cell/>
          <table:table-cell/>
        </table:table-row>
        <table:table-row>
          <table:table-cell office:value-type="float" office:value="270">
            <text:p>270</text:p>
          </table:table-cell>
          <table:table-cell office:value-type="string">
            <text:p>2026-04-27</text:p>
          </table:table-cell>
          <table:table-cell office:value-type="string">
            <text:p>Estoque inicial: Fonte-Comum (Qtd: 8)</text:p>
          </table:table-cell>
          <table:table-cell office:value-type="float" office:value="160">
            <text:p>160</text:p>
          </table:table-cell>
          <table:table-cell/>
          <table:table-cell/>
          <table:table-cell/>
        </table:table-row>
        <table:table-row>
          <table:table-cell office:value-type="float" office:value="269">
            <text:p>269</text:p>
          </table:table-cell>
          <table:table-cell office:value-type="string">
            <text:p>2026-04-27</text:p>
          </table:table-cell>
          <table:table-cell office:value-type="string">
            <text:p>Estoque inicial: SSD-120GB (Qtd: 1)</text:p>
          </table:table-cell>
          <table:table-cell office:value-type="float" office:value="120">
            <text:p>120</text:p>
          </table:table-cell>
          <table:table-cell/>
          <table:table-cell/>
          <table:table-cell/>
        </table:table-row>
        <table:table-row>
          <table:table-cell office:value-type="float" office:value="267">
            <text:p>267</text:p>
          </table:table-cell>
          <table:table-cell office:value-type="string">
            <text:p>2026-04-27</text:p>
          </table:table-cell>
          <table:table-cell office:value-type="string">
            <text:p>Estoque inicial: HD-160GB (Qtd: 1)</text:p>
          </table:table-cell>
          <table:table-cell office:value-type="float" office:value="30">
            <text:p>30</text:p>
          </table:table-cell>
          <table:table-cell/>
          <table:table-cell/>
          <table:table-cell/>
        </table:table-row>
        <table:table-row>
          <table:table-cell office:value-type="float" office:value="266">
            <text:p>266</text:p>
          </table:table-cell>
          <table:table-cell office:value-type="string">
            <text:p>2026-04-27</text:p>
          </table:table-cell>
          <table:table-cell office:value-type="string">
            <text:p>Estoque inicial: HD-320GB (Qtd: 1)</text:p>
          </table:table-cell>
          <table:table-cell office:value-type="float" office:value="40">
            <text:p>40</text:p>
          </table:table-cell>
          <table:table-cell/>
          <table:table-cell/>
          <table:table-cell/>
        </table:table-row>
        <table:table-row>
          <table:table-cell office:value-type="float" office:value="265">
            <text:p>265</text:p>
          </table:table-cell>
          <table:table-cell office:value-type="string">
            <text:p>2026-04-27</text:p>
          </table:table-cell>
          <table:table-cell office:value-type="string">
            <text:p>Estoque inicial: HD-80GB (Qtd: 2)</text:p>
          </table:table-cell>
          <table:table-cell office:value-type="float" office:value="40">
            <text:p>40</text:p>
          </table:table-cell>
          <table:table-cell/>
          <table:table-cell/>
          <table:table-cell/>
        </table:table-row>
        <table:table-row>
          <table:table-cell office:value-type="float" office:value="264">
            <text:p>264</text:p>
          </table:table-cell>
          <table:table-cell office:value-type="string">
            <text:p>2026-04-27</text:p>
          </table:table-cell>
          <table:table-cell office:value-type="string">
            <text:p>Estoque inicial: Cpu-Dual E2180 (Qtd: 3)</text:p>
          </table:table-cell>
          <table:table-cell office:value-type="float" office:value="90">
            <text:p>90</text:p>
          </table:table-cell>
          <table:table-cell/>
          <table:table-cell/>
          <table:table-cell/>
        </table:table-row>
        <table:table-row>
          <table:table-cell office:value-type="float" office:value="263">
            <text:p>263</text:p>
          </table:table-cell>
          <table:table-cell office:value-type="string">
            <text:p>2026-04-27</text:p>
          </table:table-cell>
          <table:table-cell office:value-type="string">
            <text:p>Estoque inicial: Cpu-Core 2 duo (Qtd: 4)</text:p>
          </table:table-cell>
          <table:table-cell office:value-type="float" office:value="120">
            <text:p>120</text:p>
          </table:table-cell>
          <table:table-cell/>
          <table:table-cell/>
          <table:table-cell/>
        </table:table-row>
        <table:table-row>
          <table:table-cell office:value-type="float" office:value="262">
            <text:p>262</text:p>
          </table:table-cell>
          <table:table-cell office:value-type="string">
            <text:p>2026-04-27</text:p>
          </table:table-cell>
          <table:table-cell office:value-type="string">
            <text:p>Estoque inicial: Cpu- Pentium (Qtd: 2)</text:p>
          </table:table-cell>
          <table:table-cell office:value-type="float" office:value="60">
            <text:p>60</text:p>
          </table:table-cell>
          <table:table-cell/>
          <table:table-cell/>
          <table:table-cell/>
        </table:table-row>
        <table:table-row>
          <table:table-cell office:value-type="float" office:value="261">
            <text:p>261</text:p>
          </table:table-cell>
          <table:table-cell office:value-type="string">
            <text:p>2026-04-27</text:p>
          </table:table-cell>
          <table:table-cell office:value-type="string">
            <text:p>Estoque inicial: Memoria DDR 1 1GB (Qtd: 1)</text:p>
          </table:table-cell>
          <table:table-cell office:value-type="float" office:value="5">
            <text:p>5</text:p>
          </table:table-cell>
          <table:table-cell/>
          <table:table-cell/>
          <table:table-cell/>
        </table:table-row>
        <table:table-row>
          <table:table-cell office:value-type="float" office:value="260">
            <text:p>260</text:p>
          </table:table-cell>
          <table:table-cell office:value-type="string">
            <text:p>2026-04-27</text:p>
          </table:table-cell>
          <table:table-cell office:value-type="string">
            <text:p>Estoque inicial: Memoria DDR 2 1GB (Qtd: 5)</text:p>
          </table:table-cell>
          <table:table-cell office:value-type="float" office:value="25">
            <text:p>25</text:p>
          </table:table-cell>
          <table:table-cell/>
          <table:table-cell/>
          <table:table-cell/>
        </table:table-row>
        <table:table-row>
          <table:table-cell office:value-type="float" office:value="259">
            <text:p>259</text:p>
          </table:table-cell>
          <table:table-cell office:value-type="string">
            <text:p>2026-04-27</text:p>
          </table:table-cell>
          <table:table-cell office:value-type="string">
            <text:p>Estoque inicial: Memoria DDR 2 2GB (Qtd: 6)</text:p>
          </table:table-cell>
          <table:table-cell office:value-type="float" office:value="90">
            <text:p>90</text:p>
          </table:table-cell>
          <table:table-cell/>
          <table:table-cell/>
          <table:table-cell/>
        </table:table-row>
        <table:table-row>
          <table:table-cell office:value-type="float" office:value="258">
            <text:p>258</text:p>
          </table:table-cell>
          <table:table-cell office:value-type="string">
            <text:p>2026-04-27</text:p>
          </table:table-cell>
          <table:table-cell office:value-type="string">
            <text:p>Estoque inicial: Placa mãe 775 (Qtd: 9)</text:p>
          </table:table-cell>
          <table:table-cell office:value-type="float" office:value="270">
            <text:p>270</text:p>
          </table:table-cell>
          <table:table-cell/>
          <table:table-cell/>
          <table:table-cell/>
        </table:table-row>
        <table:table-row>
          <table:table-cell office:value-type="float" office:value="257">
            <text:p>257</text:p>
          </table:table-cell>
          <table:table-cell office:value-type="string">
            <text:p>2026-04-27</text:p>
          </table:table-cell>
          <table:table-cell office:value-type="string">
            <text:p>Estoque inicial: Gabinete Torre Preto antigos (Qtd: 8)</text:p>
          </table:table-cell>
          <table:table-cell office:value-type="float" office:value="240">
            <text:p>240</text:p>
          </table:table-cell>
          <table:table-cell/>
          <table:table-cell/>
          <table:table-cell/>
        </table:table-row>
        <table:table-row>
          <table:table-cell office:value-type="float" office:value="256">
            <text:p>256</text:p>
          </table:table-cell>
          <table:table-cell office:value-type="string">
            <text:p>2026-04-27</text:p>
          </table:table-cell>
          <table:table-cell office:value-type="string">
            <text:p>Estoque inicial: Gabinete HP (Qtd: 1)</text:p>
          </table:table-cell>
          <table:table-cell office:value-type="float" office:value="30">
            <text:p>30</text:p>
          </table:table-cell>
          <table:table-cell/>
          <table:table-cell/>
          <table:table-cell/>
        </table:table-row>
        <table:table-row>
          <table:table-cell office:value-type="float" office:value="255">
            <text:p>255</text:p>
          </table:table-cell>
          <table:table-cell office:value-type="string">
            <text:p>2026-04-24</text:p>
          </table:table-cell>
          <table:table-cell office:value-type="string">
            <text:p>Estoque inicial: dv3231 - Pilha alcalina AA Pct com 2 (Qtd: 2)</text:p>
          </table:table-cell>
          <table:table-cell office:value-type="float" office:value="7.8">
            <text:p>7.8</text:p>
          </table:table-cell>
          <table:table-cell/>
          <table:table-cell/>
          <table:table-cell/>
        </table:table-row>
        <table:table-row>
          <table:table-cell office:value-type="float" office:value="254">
            <text:p>254</text:p>
          </table:table-cell>
          <table:table-cell office:value-type="string">
            <text:p>2026-04-24</text:p>
          </table:table-cell>
          <table:table-cell office:value-type="string">
            <text:p>Estoque inicial: dv6655 - Pilha alcalina AAA Pct com 2 (Qtd: 2)</text:p>
          </table:table-cell>
          <table:table-cell office:value-type="float" office:value="7.8">
            <text:p>7.8</text:p>
          </table:table-cell>
          <table:table-cell/>
          <table:table-cell/>
          <table:table-cell/>
        </table:table-row>
        <table:table-row>
          <table:table-cell office:value-type="float" office:value="253">
            <text:p>253</text:p>
          </table:table-cell>
          <table:table-cell office:value-type="string">
            <text:p>2026-04-24</text:p>
          </table:table-cell>
          <table:table-cell office:value-type="string">
            <text:p>Estoque inicial: dv8687 - Pilha alcalina AAA  Pct com 4 (Qtd: 5)</text:p>
          </table:table-cell>
          <table:table-cell office:value-type="float" office:value="34.5">
            <text:p>34.5</text:p>
          </table:table-cell>
          <table:table-cell/>
          <table:table-cell/>
          <table:table-cell/>
        </table:table-row>
        <table:table-row>
          <table:table-cell office:value-type="float" office:value="252">
            <text:p>252</text:p>
          </table:table-cell>
          <table:table-cell office:value-type="string">
            <text:p>2026-04-24</text:p>
          </table:table-cell>
          <table:table-cell office:value-type="string">
            <text:p>Estoque inicial: dv9090 - Pilha alcalina AA Pct com 4 (Qtd: 5)</text:p>
          </table:table-cell>
          <table:table-cell office:value-type="float" office:value="34.5">
            <text:p>34.5</text:p>
          </table:table-cell>
          <table:table-cell/>
          <table:table-cell/>
          <table:table-cell/>
        </table:table-row>
        <table:table-row>
          <table:table-cell office:value-type="float" office:value="247">
            <text:p>247</text:p>
          </table:table-cell>
          <table:table-cell office:value-type="string">
            <text:p>2026-04-24</text:p>
          </table:table-cell>
          <table:table-cell office:value-type="string">
            <text:p>Reposição de estoque: mu7879 - Adaptador Bluetooth Mini Usb (Qtd: 1)</text:p>
          </table:table-cell>
          <table:table-cell office:value-type="float" office:value="21.9">
            <text:p>21.9</text:p>
          </table:table-cell>
          <table:table-cell/>
          <table:table-cell/>
          <table:table-cell/>
        </table:table-row>
        <table:table-row>
          <table:table-cell office:value-type="float" office:value="246">
            <text:p>246</text:p>
          </table:table-cell>
          <table:table-cell office:value-type="string">
            <text:p>2026-04-24</text:p>
          </table:table-cell>
          <table:table-cell office:value-type="string">
            <text:p>Reposição de estoque: en2402 - Fonte real pcwells 550 - 501 ou outra (Qtd: 3)</text:p>
          </table:table-cell>
          <table:table-cell office:value-type="float" office:value="287.7">
            <text:p>287.7</text:p>
          </table:table-cell>
          <table:table-cell/>
          <table:table-cell/>
          <table:table-cell/>
        </table:table-row>
        <table:table-row>
          <table:table-cell office:value-type="float" office:value="245">
            <text:p>245</text:p>
          </table:table-cell>
          <table:table-cell office:value-type="string">
            <text:p>2026-04-23</text:p>
          </table:table-cell>
          <table:table-cell office:value-type="string">
            <text:p>Estoque inicial: mi6776 - Bateria para placa mãe  3v (Qtd: 5)</text:p>
          </table:table-cell>
          <table:table-cell office:value-type="float" office:value="8.9">
            <text:p>8.9</text:p>
          </table:table-cell>
          <table:table-cell/>
          <table:table-cell/>
          <table:table-cell/>
        </table:table-row>
        <table:table-row>
          <table:table-cell office:value-type="float" office:value="244">
            <text:p>244</text:p>
          </table:table-cell>
          <table:table-cell office:value-type="string">
            <text:p>2026-04-23</text:p>
          </table:table-cell>
          <table:table-cell office:value-type="string">
            <text:p>Estoque inicial: co5566 - Cooler para processador intel/Amd (Qtd: 5)</text:p>
          </table:table-cell>
          <table:table-cell office:value-type="float" office:value="73">
            <text:p>73</text:p>
          </table:table-cell>
          <table:table-cell/>
          <table:table-cell/>
          <table:table-cell/>
        </table:table-row>
        <table:table-row>
          <table:table-cell office:value-type="float" office:value="243">
            <text:p>243</text:p>
          </table:table-cell>
          <table:table-cell office:value-type="string">
            <text:p>2026-04-23</text:p>
          </table:table-cell>
          <table:table-cell office:value-type="string">
            <text:p>Estoque inicial: co9988 - Cooler processador intel C3TCH  FC-20 (Qtd: 2)</text:p>
          </table:table-cell>
          <table:table-cell office:value-type="float" office:value="39">
            <text:p>39</text:p>
          </table:table-cell>
          <table:table-cell/>
          <table:table-cell/>
          <table:table-cell/>
        </table:table-row>
        <table:table-row>
          <table:table-cell office:value-type="float" office:value="242">
            <text:p>242</text:p>
          </table:table-cell>
          <table:table-cell office:value-type="string">
            <text:p>2026-04-23</text:p>
          </table:table-cell>
          <table:table-cell office:value-type="string">
            <text:p>Estoque inicial: tm9987 - Mouse sem fio C3TECH Preto (Qtd: 2)</text:p>
          </table:table-cell>
          <table:table-cell office:value-type="float" office:value="37">
            <text:p>37</text:p>
          </table:table-cell>
          <table:table-cell/>
          <table:table-cell/>
          <table:table-cell/>
        </table:table-row>
        <table:table-row>
          <table:table-cell office:value-type="float" office:value="241">
            <text:p>241</text:p>
          </table:table-cell>
          <table:table-cell office:value-type="string">
            <text:p>2026-04-23</text:p>
          </table:table-cell>
          <table:table-cell office:value-type="string">
            <text:p>Estoque inicial: tm8787 - Mouse sem fio Multilaser (Qtd: 2)</text:p>
          </table:table-cell>
          <table:table-cell office:value-type="float" office:value="29.8">
            <text:p>29.8</text:p>
          </table:table-cell>
          <table:table-cell/>
          <table:table-cell/>
          <table:table-cell/>
        </table:table-row>
        <table:table-row>
          <table:table-cell office:value-type="float" office:value="240">
            <text:p>240</text:p>
          </table:table-cell>
          <table:table-cell office:value-type="string">
            <text:p>2026-04-23</text:p>
          </table:table-cell>
          <table:table-cell office:value-type="string">
            <text:p>Estoque inicial: tm6677 - Mouse sem fio Targus (Qtd: 2)</text:p>
          </table:table-cell>
          <table:table-cell office:value-type="float" office:value="27.2">
            <text:p>27.2</text:p>
          </table:table-cell>
          <table:table-cell/>
          <table:table-cell/>
          <table:table-cell/>
        </table:table-row>
        <table:table-row>
          <table:table-cell office:value-type="float" office:value="193">
            <text:p>193</text:p>
          </table:table-cell>
          <table:table-cell office:value-type="string">
            <text:p>2026-04-16</text:p>
          </table:table-cell>
          <table:table-cell office:value-type="string">
            <text:p>Reposição de estoque: co1010 - Cooler com led F7-L130M (Qtd: 3)</text:p>
          </table:table-cell>
          <table:table-cell office:value-type="float" office:value="33">
            <text:p>33</text:p>
          </table:table-cell>
          <table:table-cell/>
          <table:table-cell/>
          <table:table-cell/>
        </table:table-row>
        <table:table-row>
          <table:table-cell office:value-type="float" office:value="192">
            <text:p>192</text:p>
          </table:table-cell>
          <table:table-cell office:value-type="string">
            <text:p>2026-04-16</text:p>
          </table:table-cell>
          <table:table-cell office:value-type="string">
            <text:p>Reposição de estoque: co1122 - Cooler G-VR300  Revenger (Qtd: 7)</text:p>
          </table:table-cell>
          <table:table-cell office:value-type="float" office:value="77">
            <text:p>77</text:p>
          </table:table-cell>
          <table:table-cell/>
          <table:table-cell/>
          <table:table-cell/>
        </table:table-row>
        <table:table-row>
          <table:table-cell office:value-type="float" office:value="191">
            <text:p>191</text:p>
          </table:table-cell>
          <table:table-cell office:value-type="string">
            <text:p>2026-04-16</text:p>
          </table:table-cell>
          <table:table-cell office:value-type="string">
            <text:p>Reposição de estoque: ca4040 - Cabo de rede 2.5m Cat 6 pronto de fabrica (Qtd: 5)</text:p>
          </table:table-cell>
          <table:table-cell office:value-type="float" office:value="50">
            <text:p>50</text:p>
          </table:table-cell>
          <table:table-cell/>
          <table:table-cell/>
          <table:table-cell/>
        </table:table-row>
        <table:table-row>
          <table:table-cell office:value-type="float" office:value="190">
            <text:p>190</text:p>
          </table:table-cell>
          <table:table-cell office:value-type="string">
            <text:p>2026-04-16</text:p>
          </table:table-cell>
          <table:table-cell office:value-type="string">
            <text:p>Reposição de estoque: 16 - Fonte HP/Asus pino 4 - 3,25a - 19v (FW183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189">
            <text:p>189</text:p>
          </table:table-cell>
          <table:table-cell office:value-type="string">
            <text:p>2026-04-16</text:p>
          </table:table-cell>
          <table:table-cell office:value-type="string">
            <text:p>Reposição de estoque: re5566 - Conector RJ45 CAT 6 (Qtd: 10)</text:p>
          </table:table-cell>
          <table:table-cell office:value-type="float" office:value="3.2">
            <text:p>3.2</text:p>
          </table:table-cell>
          <table:table-cell/>
          <table:table-cell/>
          <table:table-cell/>
        </table:table-row>
        <table:table-row>
          <table:table-cell office:value-type="float" office:value="188">
            <text:p>188</text:p>
          </table:table-cell>
          <table:table-cell office:value-type="string">
            <text:p>2026-04-16</text:p>
          </table:table-cell>
          <table:table-cell office:value-type="string">
            <text:p>Reposição de estoque: re5577 - Conector rj45 CAT 5 (Qtd: 10)</text:p>
          </table:table-cell>
          <table:table-cell office:value-type="float" office:value="2.9">
            <text:p>2.9</text:p>
          </table:table-cell>
          <table:table-cell/>
          <table:table-cell/>
          <table:table-cell/>
        </table:table-row>
        <table:table-row>
          <table:table-cell office:value-type="float" office:value="187">
            <text:p>187</text:p>
          </table:table-cell>
          <table:table-cell office:value-type="string">
            <text:p>2026-04-16</text:p>
          </table:table-cell>
          <table:table-cell office:value-type="string">
            <text:p>Reposição de estoque: dr5405 - Case ssd M.2 NVME USB (Qtd: 1)</text:p>
          </table:table-cell>
          <table:table-cell office:value-type="float" office:value="66.5">
            <text:p>66.5</text:p>
          </table:table-cell>
          <table:table-cell/>
          <table:table-cell/>
          <table:table-cell/>
        </table:table-row>
        <table:table-row>
          <table:table-cell office:value-type="float" office:value="186">
            <text:p>186</text:p>
          </table:table-cell>
          <table:table-cell office:value-type="string">
            <text:p>2026-04-16</text:p>
          </table:table-cell>
          <table:table-cell office:value-type="string">
            <text:p>Reposição de estoque: ca4205 - Cabo de Rede 5m Pronto de fábrica (Qtd: 1)</text:p>
          </table:table-cell>
          <table:table-cell office:value-type="float" office:value="14.9">
            <text:p>14.9</text:p>
          </table:table-cell>
          <table:table-cell/>
          <table:table-cell/>
          <table:table-cell/>
        </table:table-row>
        <table:table-row>
          <table:table-cell office:value-type="float" office:value="185">
            <text:p>185</text:p>
          </table:table-cell>
          <table:table-cell office:value-type="string">
            <text:p>2026-04-16</text:p>
          </table:table-cell>
          <table:table-cell office:value-type="string">
            <text:p>Reposição de estoque: en2402 - Fonte real pcwells 550 - 501 ou outra (Qtd: 2)</text:p>
          </table:table-cell>
          <table:table-cell office:value-type="float" office:value="191.8">
            <text:p>191.8</text:p>
          </table:table-cell>
          <table:table-cell/>
          <table:table-cell/>
          <table:table-cell/>
        </table:table-row>
        <table:table-row>
          <table:table-cell office:value-type="float" office:value="184">
            <text:p>184</text:p>
          </table:table-cell>
          <table:table-cell office:value-type="string">
            <text:p>2026-04-16</text:p>
          </table:table-cell>
          <table:table-cell office:value-type="string">
            <text:p>Reposição de estoque: co1122 - Cooler G-VR300  Revenger (Qtd: 2)</text:p>
          </table:table-cell>
          <table:table-cell office:value-type="float" office:value="31.8">
            <text:p>31.8</text:p>
          </table:table-cell>
          <table:table-cell/>
          <table:table-cell/>
          <table:table-cell/>
        </table:table-row>
        <table:table-row>
          <table:table-cell office:value-type="float" office:value="183">
            <text:p>183</text:p>
          </table:table-cell>
          <table:table-cell office:value-type="string">
            <text:p>2026-04-16</text:p>
          </table:table-cell>
          <table:table-cell office:value-type="string">
            <text:p>Reposição de estoque: mu7879 - Adaptador Bluetooth Mini Usb (Qtd: 1)</text:p>
          </table:table-cell>
          <table:table-cell office:value-type="float" office:value="21.9">
            <text:p>21.9</text:p>
          </table:table-cell>
          <table:table-cell/>
          <table:table-cell/>
          <table:table-cell/>
        </table:table-row>
        <table:table-row>
          <table:table-cell office:value-type="float" office:value="182">
            <text:p>182</text:p>
          </table:table-cell>
          <table:table-cell office:value-type="string">
            <text:p>2026-04-16</text:p>
          </table:table-cell>
          <table:table-cell office:value-type="string">
            <text:p>Reposição de estoque: co2233 - Cooler para processador Intel (Qtd: 2)</text:p>
          </table:table-cell>
          <table:table-cell office:value-type="float" office:value="31.8">
            <text:p>31.8</text:p>
          </table:table-cell>
          <table:table-cell/>
          <table:table-cell/>
          <table:table-cell/>
        </table:table-row>
        <table:table-row>
          <table:table-cell office:value-type="float" office:value="180">
            <text:p>180</text:p>
          </table:table-cell>
          <table:table-cell office:value-type="string">
            <text:p>2026-04-16</text:p>
          </table:table-cell>
          <table:table-cell office:value-type="string">
            <text:p>Reposição de estoque: Tm8877- Teclado com fio C3 Tech (Qtd: 5)</text:p>
          </table:table-cell>
          <table:table-cell office:value-type="float" office:value="92.5">
            <text:p>92.5</text:p>
          </table:table-cell>
          <table:table-cell/>
          <table:table-cell/>
          <table:table-cell/>
        </table:table-row>
        <table:table-row>
          <table:table-cell office:value-type="float" office:value="179">
            <text:p>179</text:p>
          </table:table-cell>
          <table:table-cell office:value-type="string">
            <text:p>2026-04-16</text:p>
          </table:table-cell>
          <table:table-cell office:value-type="string">
            <text:p>Reposição de estoque: ca4406 - Cabo dvi x dvi (Qtd: 1)</text:p>
          </table:table-cell>
          <table:table-cell office:value-type="float" office:value="28.9">
            <text:p>28.9</text:p>
          </table:table-cell>
          <table:table-cell/>
          <table:table-cell/>
          <table:table-cell/>
        </table:table-row>
        <table:table-row>
          <table:table-cell office:value-type="float" office:value="178">
            <text:p>178</text:p>
          </table:table-cell>
          <table:table-cell office:value-type="string">
            <text:p>2026-04-16</text:p>
          </table:table-cell>
          <table:table-cell office:value-type="string">
            <text:p>Reposição de estoque: re2301 - Adaptador USB Wifi 600Mbps Dual Generico (Qtd: 3)</text:p>
          </table:table-cell>
          <table:table-cell office:value-type="float" office:value="101.7">
            <text:p>101.7</text:p>
          </table:table-cell>
          <table:table-cell/>
          <table:table-cell/>
          <table:table-cell/>
        </table:table-row>
        <table:table-row>
          <table:table-cell office:value-type="float" office:value="158">
            <text:p>158</text:p>
          </table:table-cell>
          <table:table-cell office:value-type="string">
            <text:p>2026-04-15</text:p>
          </table:table-cell>
          <table:table-cell office:value-type="string">
            <text:p>Reposição de estoque: ca4205 - Cabo de Rede 5m Pronto de fábrica (Qtd: 1)</text:p>
          </table:table-cell>
          <table:table-cell office:value-type="float" office:value="14.9">
            <text:p>14.9</text:p>
          </table:table-cell>
          <table:table-cell/>
          <table:table-cell/>
          <table:table-cell/>
        </table:table-row>
        <table:table-row>
          <table:table-cell office:value-type="float" office:value="157">
            <text:p>157</text:p>
          </table:table-cell>
          <table:table-cell office:value-type="string">
            <text:p>2026-04-15</text:p>
          </table:table-cell>
          <table:table-cell office:value-type="string">
            <text:p>Reposição de estoque: mu7879 - Adaptador Bluetooth Mini Usb (Qtd: 1)</text:p>
          </table:table-cell>
          <table:table-cell office:value-type="float" office:value="21.9">
            <text:p>21.9</text:p>
          </table:table-cell>
          <table:table-cell/>
          <table:table-cell/>
          <table:table-cell/>
        </table:table-row>
        <table:table-row>
          <table:table-cell office:value-type="float" office:value="154">
            <text:p>154</text:p>
          </table:table-cell>
          <table:table-cell office:value-type="string">
            <text:p>2026-04-15</text:p>
          </table:table-cell>
          <table:table-cell office:value-type="string">
            <text:p>Reposição de estoque: en6411 - Extensao 3metros branco ou preto 3 pinos (Qtd: 2)</text:p>
          </table:table-cell>
          <table:table-cell office:value-type="float" office:value="41.8">
            <text:p>41.8</text:p>
          </table:table-cell>
          <table:table-cell/>
          <table:table-cell/>
          <table:table-cell/>
        </table:table-row>
        <table:table-row>
          <table:table-cell office:value-type="float" office:value="153">
            <text:p>153</text:p>
          </table:table-cell>
          <table:table-cell office:value-type="string">
            <text:p>2026-04-15</text:p>
          </table:table-cell>
          <table:table-cell office:value-type="string">
            <text:p>Reposição de estoque: re2301 - Adaptador USB Wifi 600Mbps Dual Generico (Qtd: 3)</text:p>
          </table:table-cell>
          <table:table-cell office:value-type="float" office:value="101.7">
            <text:p>101.7</text:p>
          </table:table-cell>
          <table:table-cell/>
          <table:table-cell/>
          <table:table-cell/>
        </table:table-row>
        <table:table-row>
          <table:table-cell office:value-type="float" office:value="140">
            <text:p>140</text:p>
          </table:table-cell>
          <table:table-cell office:value-type="string">
            <text:p>2026-04-15</text:p>
          </table:table-cell>
          <table:table-cell office:value-type="string">
            <text:p>Migracao do saldo atual para lotes: Itens usados (Qtd: 1)</text:p>
          </table:table-cell>
          <table:table-cell office:value-type="float" office:value="10861.98">
            <text:p>10861.98</text:p>
          </table:table-cell>
          <table:table-cell/>
          <table:table-cell/>
          <table:table-cell/>
        </table:table-row>
        <table:table-row>
          <table:table-cell office:value-type="float" office:value="150">
            <text:p>150</text:p>
          </table:table-cell>
          <table:table-cell office:value-type="string">
            <text:p>2026-04-15</text:p>
          </table:table-cell>
          <table:table-cell office:value-type="string">
            <text:p>Migracao do saldo atual para lotes: co2233 - Cooler para processador Intel (Qtd: 2)</text:p>
          </table:table-cell>
          <table:table-cell office:value-type="float" office:value="31.8">
            <text:p>31.8</text:p>
          </table:table-cell>
          <table:table-cell/>
          <table:table-cell/>
          <table:table-cell/>
        </table:table-row>
        <table:table-row>
          <table:table-cell office:value-type="float" office:value="149">
            <text:p>149</text:p>
          </table:table-cell>
          <table:table-cell office:value-type="string">
            <text:p>2026-04-15</text:p>
          </table:table-cell>
          <table:table-cell office:value-type="string">
            <text:p>Migracao do saldo atual para lotes: co1122 - Cooler G-VR300  Revenger (Qtd: 9)</text:p>
          </table:table-cell>
          <table:table-cell office:value-type="float" office:value="143.1">
            <text:p>143.1</text:p>
          </table:table-cell>
          <table:table-cell/>
          <table:table-cell/>
          <table:table-cell/>
        </table:table-row>
        <table:table-row>
          <table:table-cell office:value-type="float" office:value="91">
            <text:p>91</text:p>
          </table:table-cell>
          <table:table-cell office:value-type="string">
            <text:p>2026-04-15</text:p>
          </table:table-cell>
          <table:table-cell office:value-type="string">
            <text:p>Migracao do saldo atual para lotes: re2301 - Adaptador USB Wifi 600Mbps Dual Generico (Qtd: 2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121">
            <text:p>121</text:p>
          </table:table-cell>
          <table:table-cell office:value-type="string">
            <text:p>2026-04-15</text:p>
          </table:table-cell>
          <table:table-cell office:value-type="string">
            <text:p>Migracao do saldo atual para lotes: dv7909 - Pilha Alcalina 2A custo unit. 3  venda minima 2 por 10 (Qtd: 6)</text:p>
          </table:table-cell>
          <table:table-cell office:value-type="float" office:value="65.4">
            <text:p>65.4</text:p>
          </table:table-cell>
          <table:table-cell/>
          <table:table-cell/>
          <table:table-cell/>
        </table:table-row>
        <table:table-row>
          <table:table-cell office:value-type="float" office:value="141">
            <text:p>141</text:p>
          </table:table-cell>
          <table:table-cell office:value-type="string">
            <text:p>2026-04-15</text:p>
          </table:table-cell>
          <table:table-cell office:value-type="string">
            <text:p>Migracao do saldo atual para lotes: mi5708 - Bateria para PLM CMOS (Qtd: 3)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5">
            <text:p>135</text:p>
          </table:table-cell>
          <table:table-cell office:value-type="string">
            <text:p>2026-04-15</text:p>
          </table:table-cell>
          <table:table-cell office:value-type="string">
            <text:p>Migracao do saldo atual para lotes: co1010 - Cooler com led F7-L130M (Qtd: 1)</text:p>
          </table:table-cell>
          <table:table-cell office:value-type="float" office:value="30">
            <text:p>30</text:p>
          </table:table-cell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string">
            <text:p>2026-04-15</text:p>
          </table:table-cell>
          <table:table-cell office:value-type="string">
            <text:p>Migracao do saldo atual para lotes: 17 - Fonte Dell ultra pino 4 - 4,62a - 19,5v (FT109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101">
            <text:p>101</text:p>
          </table:table-cell>
          <table:table-cell office:value-type="string">
            <text:p>2026-04-15</text:p>
          </table:table-cell>
          <table:table-cell office:value-type="string">
            <text:p>Migracao do saldo atual para lotes: dr3502 - Pen drive 8gb multi prata (Qtd: 4)</text:p>
          </table:table-cell>
          <table:table-cell office:value-type="float" office:value="79.6">
            <text:p>79.6</text:p>
          </table:table-cell>
          <table:table-cell/>
          <table:table-cell/>
          <table:table-cell/>
        </table:table-row>
        <table:table-row>
          <table:table-cell office:value-type="float" office:value="5">
            <text:p>5</text:p>
          </table:table-cell>
          <table:table-cell office:value-type="string">
            <text:p>2026-04-15</text:p>
          </table:table-cell>
          <table:table-cell office:value-type="string">
            <text:p>Migracao do saldo atual para lotes: 14 - Fonte Positivo pino 3 - 3a - 5v (FT135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4">
            <text:p>4</text:p>
          </table:table-cell>
          <table:table-cell office:value-type="string">
            <text:p>2026-04-15</text:p>
          </table:table-cell>
          <table:table-cell office:value-type="string">
            <text:p>Migracao do saldo atual para lotes: 11 - Fonte Asus pino 2,3 - 2,1a - 19v (FT006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29">
            <text:p>29</text:p>
          </table:table-cell>
          <table:table-cell office:value-type="string">
            <text:p>2026-04-15</text:p>
          </table:table-cell>
          <table:table-cell office:value-type="string">
            <text:p>Migracao do saldo atual para lotes: 56 - Fonte Lenovo retangular - 3,25a- 20v (FT103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67">
            <text:p>67</text:p>
          </table:table-cell>
          <table:table-cell office:value-type="string">
            <text:p>2026-04-15</text:p>
          </table:table-cell>
          <table:table-cell office:value-type="string">
            <text:p>Migracao do saldo atual para lotes: en2402 - Fonte real pcwells 550 - 501 ou outra (Qtd: 5)</text:p>
          </table:table-cell>
          <table:table-cell office:value-type="float" office:value="475">
            <text:p>475</text:p>
          </table:table-cell>
          <table:table-cell/>
          <table:table-cell/>
          <table:table-cell/>
        </table:table-row>
        <table:table-row>
          <table:table-cell office:value-type="float" office:value="136">
            <text:p>136</text:p>
          </table:table-cell>
          <table:table-cell office:value-type="string">
            <text:p>2026-04-14</text:p>
          </table:table-cell>
          <table:table-cell office:value-type="string">
            <text:p>Migracao do saldo atual para lotes: co4545 - Cooler com led F7-100 (Qtd: 1)</text:p>
          </table:table-cell>
          <table:table-cell office:value-type="float" office:value="30">
            <text:p>30</text:p>
          </table:table-cell>
          <table:table-cell/>
          <table:table-cell/>
          <table:table-cell/>
        </table:table-row>
        <table:table-row>
          <table:table-cell office:value-type="float" office:value="7">
            <text:p>7</text:p>
          </table:table-cell>
          <table:table-cell office:value-type="string">
            <text:p>2026-04-01</text:p>
          </table:table-cell>
          <table:table-cell office:value-type="string">
            <text:p>Migracao do saldo atual para lotes: 22 - Fonte Lenovo pino 4 - 3,25a - 20v (FW133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41">
            <text:p>41</text:p>
          </table:table-cell>
          <table:table-cell office:value-type="string">
            <text:p>2026-04-01</text:p>
          </table:table-cell>
          <table:table-cell office:value-type="string">
            <text:p>Migracao do saldo atual para lotes: ca6101 - Cx05 Cabo    P2xP2    varios tamanhos (Qtd: 5)</text:p>
          </table:table-cell>
          <table:table-cell office:value-type="float" office:value="25">
            <text:p>25</text:p>
          </table:table-cell>
          <table:table-cell/>
          <table:table-cell/>
          <table:table-cell/>
        </table:table-row>
        <table:table-row>
          <table:table-cell office:value-type="float" office:value="108">
            <text:p>108</text:p>
          </table:table-cell>
          <table:table-cell office:value-type="string">
            <text:p>2026-04-01</text:p>
          </table:table-cell>
          <table:table-cell office:value-type="string">
            <text:p>Migracao do saldo atual para lotes: re6699 - Placa PCI /100 (Qtd: 2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83">
            <text:p>83</text:p>
          </table:table-cell>
          <table:table-cell office:value-type="string">
            <text:p>2026-04-01</text:p>
          </table:table-cell>
          <table:table-cell office:value-type="string">
            <text:p>Migracao do saldo atual para lotes: mu3207 - caixa som bluetooth 20w (Qtd: 2)</text:p>
          </table:table-cell>
          <table:table-cell office:value-type="float" office:value="110">
            <text:p>110</text:p>
          </table:table-cell>
          <table:table-cell/>
          <table:table-cell/>
          <table:table-cell/>
        </table:table-row>
        <table:table-row>
          <table:table-cell office:value-type="float" office:value="132">
            <text:p>132</text:p>
          </table:table-cell>
          <table:table-cell office:value-type="string">
            <text:p>2026-04-01</text:p>
          </table:table-cell>
          <table:table-cell office:value-type="string">
            <text:p>Migracao do saldo atual para lotes: mu9226 - Microfone de lapela (Qtd: 1)</text:p>
          </table:table-cell>
          <table:table-cell office:value-type="float" office:value="20">
            <text:p>20</text:p>
          </table:table-cell>
          <table:table-cell/>
          <table:table-cell/>
          <table:table-cell/>
        </table:table-row>
        <table:table-row>
          <table:table-cell office:value-type="float" office:value="8">
            <text:p>8</text:p>
          </table:table-cell>
          <table:table-cell office:value-type="string">
            <text:p>2026-04-01</text:p>
          </table:table-cell>
          <table:table-cell office:value-type="string">
            <text:p>Migracao do saldo atual para lotes: 23 - Fonte HP pino 4,5 - 3,33a - 19,5v (FT112) (Qtd: 2)</text:p>
          </table:table-cell>
          <table:table-cell office:value-type="float" office:value="160">
            <text:p>160</text:p>
          </table:table-cell>
          <table:table-cell/>
          <table:table-cell/>
          <table:table-cell/>
        </table:table-row>
        <table:table-row>
          <table:table-cell office:value-type="float" office:value="66">
            <text:p>66</text:p>
          </table:table-cell>
          <table:table-cell office:value-type="string">
            <text:p>2026-04-01</text:p>
          </table:table-cell>
          <table:table-cell office:value-type="string">
            <text:p>Migracao do saldo atual para lotes: dv8509 - Suporte p/ notebook na cama ou sofá (Qtd: 1)</text:p>
          </table:table-cell>
          <table:table-cell office:value-type="float" office:value="50">
            <text:p>50</text:p>
          </table:table-cell>
          <table:table-cell/>
          <table:table-cell/>
          <table:table-cell/>
        </table:table-row>
        <table:table-row>
          <table:table-cell office:value-type="float" office:value="116">
            <text:p>116</text:p>
          </table:table-cell>
          <table:table-cell office:value-type="string">
            <text:p>2026-04-01</text:p>
          </table:table-cell>
          <table:table-cell office:value-type="string">
            <text:p>Migracao do saldo atual para lotes: tm3940 -  Teclado s/ fio C3Tech c/ touchpad (Qtd: 1)</text:p>
          </table:table-cell>
          <table:table-cell office:value-type="float" office:value="96">
            <text:p>96</text:p>
          </table:table-cell>
          <table:table-cell/>
          <table:table-cell/>
          <table:table-cell/>
        </table:table-row>
        <table:table-row>
          <table:table-cell office:value-type="float" office:value="115">
            <text:p>115</text:p>
          </table:table-cell>
          <table:table-cell office:value-type="string">
            <text:p>2026-04-01</text:p>
          </table:table-cell>
          <table:table-cell office:value-type="string">
            <text:p>Migracao do saldo atual para lotes: tm3909 - Kit Teclado +mouse C3tech sem fio (Qtd: 2)</text:p>
          </table:table-cell>
          <table:table-cell office:value-type="float" office:value="128">
            <text:p>128</text:p>
          </table:table-cell>
          <table:table-cell/>
          <table:table-cell/>
          <table:table-cell/>
        </table:table-row>
        <table:table-row>
          <table:table-cell office:value-type="float" office:value="139">
            <text:p>139</text:p>
          </table:table-cell>
          <table:table-cell office:value-type="string">
            <text:p>2026-04-01</text:p>
          </table:table-cell>
          <table:table-cell office:value-type="string">
            <text:p>Migracao do saldo atual para lotes: mu8976 - Fone de ouvido Stereo (Qtd: 1)</text:p>
          </table:table-cell>
          <table:table-cell office:value-type="float" office:value="20">
            <text:p>20</text:p>
          </table:table-cell>
          <table:table-cell/>
          <table:table-cell/>
          <table:table-cell/>
        </table:table-row>
        <table:table-row>
          <table:table-cell office:value-type="float" office:value="123">
            <text:p>123</text:p>
          </table:table-cell>
          <table:table-cell office:value-type="string">
            <text:p>2026-04-01</text:p>
          </table:table-cell>
          <table:table-cell office:value-type="string">
            <text:p>Migracao do saldo atual para lotes: ce7563 - Cabo USB X micro USB 1.5m (Qtd: 1)</text:p>
          </table:table-cell>
          <table:table-cell office:value-type="float" office:value="7.9">
            <text:p>7.9</text:p>
          </table:table-cell>
          <table:table-cell/>
          <table:table-cell/>
          <table:table-cell/>
        </table:table-row>
        <table:table-row>
          <table:table-cell office:value-type="float" office:value="117">
            <text:p>117</text:p>
          </table:table-cell>
          <table:table-cell office:value-type="string">
            <text:p>2026-04-01</text:p>
          </table:table-cell>
          <table:table-cell office:value-type="string">
            <text:p>Migracao do saldo atual para lotes: ce7562 - Cabo de carregador V8 (Qtd: 2)</text:p>
          </table:table-cell>
          <table:table-cell office:value-type="float" office:value="11.8">
            <text:p>11.8</text:p>
          </table:table-cell>
          <table:table-cell/>
          <table:table-cell/>
          <table:table-cell/>
        </table:table-row>
        <table:table-row>
          <table:table-cell office:value-type="float" office:value="118">
            <text:p>118</text:p>
          </table:table-cell>
          <table:table-cell office:value-type="string">
            <text:p>2026-04-01</text:p>
          </table:table-cell>
          <table:table-cell office:value-type="string">
            <text:p>Migracao do saldo atual para lotes: ce7530 - Carregador tomada c/2 usb (Qtd: 1)</text:p>
          </table:table-cell>
          <table:table-cell office:value-type="float" office:value="21.9">
            <text:p>21.9</text:p>
          </table:table-cell>
          <table:table-cell/>
          <table:table-cell/>
          <table:table-cell/>
        </table:table-row>
        <table:table-row>
          <table:table-cell office:value-type="float" office:value="122">
            <text:p>122</text:p>
          </table:table-cell>
          <table:table-cell office:value-type="string">
            <text:p>2026-04-01</text:p>
          </table:table-cell>
          <table:table-cell office:value-type="string">
            <text:p>Migracao do saldo atual para lotes: dv7910 - Pilha Alcalina 3A  custo unit. 3  venda minima 2 por 10 (Qtd: 2)</text:p>
          </table:table-cell>
          <table:table-cell office:value-type="float" office:value="21.8">
            <text:p>21.8</text:p>
          </table:table-cell>
          <table:table-cell/>
          <table:table-cell/>
          <table:table-cell/>
        </table:table-row>
        <table:table-row>
          <table:table-cell office:value-type="float" office:value="138">
            <text:p>138</text:p>
          </table:table-cell>
          <table:table-cell office:value-type="string">
            <text:p>2026-04-01</text:p>
          </table:table-cell>
          <table:table-cell office:value-type="string">
            <text:p>Migracao do saldo atual para lotes: re7744 - Placa wifi Knup (Qtd: 1)</text:p>
          </table:table-cell>
          <table:table-cell office:value-type="float" office:value="40">
            <text:p>40</text:p>
          </table:table-cell>
          <table:table-cell/>
          <table:table-cell/>
          <table:table-cell/>
        </table:table-row>
        <table:table-row>
          <table:table-cell office:value-type="float" office:value="111">
            <text:p>111</text:p>
          </table:table-cell>
          <table:table-cell office:value-type="string">
            <text:p>2026-04-01</text:p>
          </table:table-cell>
          <table:table-cell office:value-type="string">
            <text:p>Migracao do saldo atual para lotes: dv8866 - Suporte para TV de 14 a 70" Max 100kg (Qtd: 1)</text:p>
          </table:table-cell>
          <table:table-cell office:value-type="float" office:value="25">
            <text:p>25</text:p>
          </table:table-cell>
          <table:table-cell/>
          <table:table-cell/>
          <table:table-cell/>
        </table:table-row>
        <table:table-row>
          <table:table-cell office:value-type="float" office:value="89">
            <text:p>89</text:p>
          </table:table-cell>
          <table:table-cell office:value-type="string">
            <text:p>2026-03-31</text:p>
          </table:table-cell>
          <table:table-cell office:value-type="string">
            <text:p>Migracao do saldo atual para lotes: mu4712 - USB Virtual 7.1 Channel Sound Adapter (Qtd: 1)</text:p>
          </table:table-cell>
          <table:table-cell office:value-type="float" office:value="20">
            <text:p>20</text:p>
          </table:table-cell>
          <table:table-cell/>
          <table:table-cell/>
          <table:table-cell/>
        </table:table-row>
        <table:table-row>
          <table:table-cell office:value-type="float" office:value="137">
            <text:p>137</text:p>
          </table:table-cell>
          <table:table-cell office:value-type="string">
            <text:p>2026-03-31</text:p>
          </table:table-cell>
          <table:table-cell office:value-type="string">
            <text:p>Migracao do saldo atual para lotes: co1515 - Cooler com led  DEX (Qtd: 1)</text:p>
          </table:table-cell>
          <table:table-cell office:value-type="float" office:value="30">
            <text:p>30</text:p>
          </table:table-cell>
          <table:table-cell/>
          <table:table-cell/>
          <table:table-cell/>
        </table:table-row>
        <table:table-row>
          <table:table-cell office:value-type="float" office:value="134">
            <text:p>134</text:p>
          </table:table-cell>
          <table:table-cell office:value-type="string">
            <text:p>2026-03-31</text:p>
          </table:table-cell>
          <table:table-cell office:value-type="string">
            <text:p>Migracao do saldo atual para lotes: co3131 - Cooler para gabinete Knup (Qtd: 1)</text:p>
          </table:table-cell>
          <table:table-cell office:value-type="float" office:value="12">
            <text:p>12</text:p>
          </table:table-cell>
          <table:table-cell/>
          <table:table-cell/>
          <table:table-cell/>
        </table:table-row>
        <table:table-row>
          <table:table-cell office:value-type="float" office:value="133">
            <text:p>133</text:p>
          </table:table-cell>
          <table:table-cell office:value-type="string">
            <text:p>2026-03-31</text:p>
          </table:table-cell>
          <table:table-cell office:value-type="string">
            <text:p>Migracao do saldo atual para lotes: co4101 - Cooler AMD (Qtd: 2)</text:p>
          </table:table-cell>
          <table:table-cell office:value-type="float" office:value="42">
            <text:p>42</text:p>
          </table:table-cell>
          <table:table-cell/>
          <table:table-cell/>
          <table:table-cell/>
        </table:table-row>
        <table:table-row>
          <table:table-cell office:value-type="float" office:value="131">
            <text:p>131</text:p>
          </table:table-cell>
          <table:table-cell office:value-type="string">
            <text:p>2026-03-31</text:p>
          </table:table-cell>
          <table:table-cell office:value-type="string">
            <text:p>Migracao do saldo atual para lotes: co2016 - Base para notebook com cooler C3TECH (Qtd: 1)</text:p>
          </table:table-cell>
          <table:table-cell office:value-type="float" office:value="76">
            <text:p>76</text:p>
          </table:table-cell>
          <table:table-cell/>
          <table:table-cell/>
          <table:table-cell/>
        </table:table-row>
        <table:table-row>
          <table:table-cell office:value-type="float" office:value="130">
            <text:p>130</text:p>
          </table:table-cell>
          <table:table-cell office:value-type="string">
            <text:p>2026-03-31</text:p>
          </table:table-cell>
          <table:table-cell office:value-type="string">
            <text:p>Migracao do saldo atual para lotes: co2015 - Base para notebook com cooler multilaser (Qtd: 1)</text:p>
          </table:table-cell>
          <table:table-cell office:value-type="float" office:value="76">
            <text:p>76</text:p>
          </table:table-cell>
          <table:table-cell/>
          <table:table-cell/>
          <table:table-cell/>
        </table:table-row>
        <table:table-row>
          <table:table-cell office:value-type="float" office:value="129">
            <text:p>129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8080 - Pilha 12 volts  custo unit. 3  venda minima 2 por 10 (Qtd: 1)</text:p>
          </table:table-cell>
          <table:table-cell office:value-type="float" office:value="6">
            <text:p>6</text:p>
          </table:table-cell>
          <table:table-cell/>
          <table:table-cell/>
          <table:table-cell/>
        </table:table-row>
        <table:table-row>
          <table:table-cell office:value-type="float" office:value="128">
            <text:p>128</text:p>
          </table:table-cell>
          <table:table-cell office:value-type="string">
            <text:p>2026-03-31</text:p>
          </table:table-cell>
          <table:table-cell office:value-type="string">
            <text:p>Migracao do saldo atual para lotes: mu5452 - Fone de ouvido Simples (Qtd: 1)</text:p>
          </table:table-cell>
          <table:table-cell office:value-type="float" office:value="20">
            <text:p>20</text:p>
          </table:table-cell>
          <table:table-cell/>
          <table:table-cell/>
          <table:table-cell/>
        </table:table-row>
        <table:table-row>
          <table:table-cell office:value-type="float" office:value="20">
            <text:p>20</text:p>
          </table:table-cell>
          <table:table-cell office:value-type="string">
            <text:p>2026-03-31</text:p>
          </table:table-cell>
          <table:table-cell office:value-type="string">
            <text:p>Migracao do saldo atual para lotes: 43 - Fonte Toshiba/Itaút/Asus/positivo pino 5,5 - 3,42a - 19v (FT036) (Qtd: 2)</text:p>
          </table:table-cell>
          <table:table-cell office:value-type="float" office:value="160">
            <text:p>160</text:p>
          </table:table-cell>
          <table:table-cell/>
          <table:table-cell/>
          <table:table-cell/>
        </table:table-row>
        <table:table-row>
          <table:table-cell office:value-type="float" office:value="120">
            <text:p>120</text:p>
          </table:table-cell>
          <table:table-cell office:value-type="string">
            <text:p>2026-03-31</text:p>
          </table:table-cell>
          <table:table-cell office:value-type="string">
            <text:p>Migracao do saldo atual para lotes: dr8001 - SSD Nvme KingFast 256GB (Qtd: 1)</text:p>
          </table:table-cell>
          <table:table-cell office:value-type="float" office:value="269.5">
            <text:p>269.5</text:p>
          </table:table-cell>
          <table:table-cell/>
          <table:table-cell/>
          <table:table-cell/>
        </table:table-row>
        <table:table-row>
          <table:table-cell office:value-type="float" office:value="57">
            <text:p>57</text:p>
          </table:table-cell>
          <table:table-cell office:value-type="string">
            <text:p>2026-03-31</text:p>
          </table:table-cell>
          <table:table-cell office:value-type="string">
            <text:p>Migracao do saldo atual para lotes: dr5404 - Case Gaveta para HD (Qtd: 6)</text:p>
          </table:table-cell>
          <table:table-cell office:value-type="float" office:value="150">
            <text:p>150</text:p>
          </table:table-cell>
          <table:table-cell/>
          <table:table-cell/>
          <table:table-cell/>
        </table:table-row>
        <table:table-row>
          <table:table-cell office:value-type="float" office:value="127">
            <text:p>127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6120 - 2 Organizadores de fios e cabos pequenos (Qtd: 1)</text:p>
          </table:table-cell>
          <table:table-cell office:value-type="float" office:value="13">
            <text:p>13</text:p>
          </table:table-cell>
          <table:table-cell/>
          <table:table-cell/>
          <table:table-cell/>
        </table:table-row>
        <table:table-row>
          <table:table-cell office:value-type="float" office:value="126">
            <text:p>126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5909  - Organizador de fios e cabos 3 metros (Qtd: 1)</text:p>
          </table:table-cell>
          <table:table-cell office:value-type="float" office:value="13">
            <text:p>13</text:p>
          </table:table-cell>
          <table:table-cell/>
          <table:table-cell/>
          <table:table-cell/>
        </table:table-row>
        <table:table-row>
          <table:table-cell office:value-type="float" office:value="125">
            <text:p>125</text:p>
          </table:table-cell>
          <table:table-cell office:value-type="string">
            <text:p>2026-03-31</text:p>
          </table:table-cell>
          <table:table-cell office:value-type="string">
            <text:p>Migracao do saldo atual para lotes: mu0202 - Caixa de som SP-301 (Qtd: 1)</text:p>
          </table:table-cell>
          <table:table-cell office:value-type="float" office:value="40">
            <text:p>40</text:p>
          </table:table-cell>
          <table:table-cell/>
          <table:table-cell/>
          <table:table-cell/>
        </table:table-row>
        <table:table-row>
          <table:table-cell office:value-type="float" office:value="124">
            <text:p>124</text:p>
          </table:table-cell>
          <table:table-cell office:value-type="string">
            <text:p>2026-03-31</text:p>
          </table:table-cell>
          <table:table-cell office:value-type="string">
            <text:p>Migracao do saldo atual para lotes: mu0101 - Caixa de som SP-40 (Qtd: 1)</text:p>
          </table:table-cell>
          <table:table-cell office:value-type="float" office:value="40">
            <text:p>40</text:p>
          </table:table-cell>
          <table:table-cell/>
          <table:table-cell/>
          <table:table-cell/>
        </table:table-row>
        <table:table-row>
          <table:table-cell office:value-type="float" office:value="119">
            <text:p>119</text:p>
          </table:table-cell>
          <table:table-cell office:value-type="string">
            <text:p>2026-03-31</text:p>
          </table:table-cell>
          <table:table-cell office:value-type="string">
            <text:p>Migracao do saldo atual para lotes: 13 - Fonte Sans/acer/LG- pino 3 - 3,42A- 19,0v- FT 119 (Qtd: 2)</text:p>
          </table:table-cell>
          <table:table-cell office:value-type="float" office:value="160">
            <text:p>160</text:p>
          </table:table-cell>
          <table:table-cell/>
          <table:table-cell/>
          <table:table-cell/>
        </table:table-row>
        <table:table-row>
          <table:table-cell office:value-type="float" office:value="114">
            <text:p>114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6110 - Pasta termica silver seringa 1gr (Qtd: 2)</text:p>
          </table:table-cell>
          <table:table-cell office:value-type="float" office:value="14">
            <text:p>14</text:p>
          </table:table-cell>
          <table:table-cell/>
          <table:table-cell/>
          <table:table-cell/>
        </table:table-row>
        <table:table-row>
          <table:table-cell office:value-type="float" office:value="113">
            <text:p>113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2109 - Conversor USB 3.0  para HDMI FEMEA (Qtd: 1)</text:p>
          </table:table-cell>
          <table:table-cell office:value-type="float" office:value="57">
            <text:p>57</text:p>
          </table:table-cell>
          <table:table-cell/>
          <table:table-cell/>
          <table:table-cell/>
        </table:table-row>
        <table:table-row>
          <table:table-cell office:value-type="float" office:value="110">
            <text:p>110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2221 - Suporte para TV de 14 a 84" Max 100kg (Qtd: 1)</text:p>
          </table:table-cell>
          <table:table-cell office:value-type="float" office:value="25">
            <text:p>25</text:p>
          </table:table-cell>
          <table:table-cell/>
          <table:table-cell/>
          <table:table-cell/>
        </table:table-row>
        <table:table-row>
          <table:table-cell office:value-type="float" office:value="109">
            <text:p>109</text:p>
          </table:table-cell>
          <table:table-cell office:value-type="string">
            <text:p>2026-03-31</text:p>
          </table:table-cell>
          <table:table-cell office:value-type="string">
            <text:p>Migracao do saldo atual para lotes: re3322 - Placa de rede Knup (Qtd: 1)</text:p>
          </table:table-cell>
          <table:table-cell office:value-type="float" office:value="40">
            <text:p>40</text:p>
          </table:table-cell>
          <table:table-cell/>
          <table:table-cell/>
          <table:table-cell/>
        </table:table-row>
        <table:table-row>
          <table:table-cell office:value-type="float" office:value="107">
            <text:p>107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0003 - Caddy p/ segundo HD 9,5mm (Qtd: 1)</text:p>
          </table:table-cell>
          <table:table-cell office:value-type="float" office:value="25">
            <text:p>25</text:p>
          </table:table-cell>
          <table:table-cell/>
          <table:table-cell/>
          <table:table-cell/>
        </table:table-row>
        <table:table-row>
          <table:table-cell office:value-type="float" office:value="106">
            <text:p>106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0001 - Caddy p/ segundo HD 12,7mm (Qtd: 2)</text:p>
          </table:table-cell>
          <table:table-cell office:value-type="float" office:value="50">
            <text:p>50</text:p>
          </table:table-cell>
          <table:table-cell/>
          <table:table-cell/>
          <table:table-cell/>
        </table:table-row>
        <table:table-row>
          <table:table-cell office:value-type="float" office:value="105">
            <text:p>105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8402 - kit placa mae cpu e gabinete (Qtd: 1)</text:p>
          </table:table-cell>
          <table:table-cell office:value-type="float" office:value="750">
            <text:p>750</text:p>
          </table:table-cell>
          <table:table-cell/>
          <table:table-cell/>
          <table:table-cell/>
        </table:table-row>
        <table:table-row>
          <table:table-cell office:value-type="float" office:value="104">
            <text:p>104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8506 - Placa de video gforce (Qtd: 1)</text:p>
          </table:table-cell>
          <table:table-cell office:value-type="float" office:value="110">
            <text:p>110</text:p>
          </table:table-cell>
          <table:table-cell/>
          <table:table-cell/>
          <table:table-cell/>
        </table:table-row>
        <table:table-row>
          <table:table-cell office:value-type="float" office:value="103">
            <text:p>103</text:p>
          </table:table-cell>
          <table:table-cell office:value-type="string">
            <text:p>2026-03-31</text:p>
          </table:table-cell>
          <table:table-cell office:value-type="string">
            <text:p>Migracao do saldo atual para lotes: dr3702 - Pen drive 64Gb Multi (Qtd: 2)</text:p>
          </table:table-cell>
          <table:table-cell office:value-type="float" office:value="73.8">
            <text:p>73.8</text:p>
          </table:table-cell>
          <table:table-cell/>
          <table:table-cell/>
          <table:table-cell/>
        </table:table-row>
        <table:table-row>
          <table:table-cell office:value-type="float" office:value="102">
            <text:p>102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5602 - Cabo usb x impressora (Qtd: 2)</text:p>
          </table:table-cell>
          <table:table-cell office:value-type="float" office:value="18.2">
            <text:p>18.2</text:p>
          </table:table-cell>
          <table:table-cell/>
          <table:table-cell/>
          <table:table-cell/>
        </table:table-row>
        <table:table-row>
          <table:table-cell office:value-type="float" office:value="100">
            <text:p>100</text:p>
          </table:table-cell>
          <table:table-cell office:value-type="string">
            <text:p>2026-03-31</text:p>
          </table:table-cell>
          <table:table-cell office:value-type="string">
            <text:p>Migracao do saldo atual para lotes: tm4311 - apoio para punho (Qtd: 1)</text:p>
          </table:table-cell>
          <table:table-cell office:value-type="float" office:value="49.5">
            <text:p>49.5</text:p>
          </table:table-cell>
          <table:table-cell/>
          <table:table-cell/>
          <table:table-cell/>
        </table:table-row>
        <table:table-row>
          <table:table-cell office:value-type="float" office:value="99">
            <text:p>99</text:p>
          </table:table-cell>
          <table:table-cell office:value-type="string">
            <text:p>2026-03-31</text:p>
          </table:table-cell>
          <table:table-cell office:value-type="string">
            <text:p>Migracao do saldo atual para lotes: tm4207 - Kit gamer (teclado+ mouse e pad) (Qtd: 1)</text:p>
          </table:table-cell>
          <table:table-cell office:value-type="float" office:value="50">
            <text:p>50</text:p>
          </table:table-cell>
          <table:table-cell/>
          <table:table-cell/>
          <table:table-cell/>
        </table:table-row>
        <table:table-row>
          <table:table-cell office:value-type="float" office:value="98">
            <text:p>98</text:p>
          </table:table-cell>
          <table:table-cell office:value-type="string">
            <text:p>2026-03-31</text:p>
          </table:table-cell>
          <table:table-cell office:value-type="string">
            <text:p>Migracao do saldo atual para lotes: tm3809 - Teclado + mouse s/fio MAX PRINT  preto (Qtd: 1)</text:p>
          </table:table-cell>
          <table:table-cell office:value-type="float" office:value="54">
            <text:p>54</text:p>
          </table:table-cell>
          <table:table-cell/>
          <table:table-cell/>
          <table:table-cell/>
        </table:table-row>
        <table:table-row>
          <table:table-cell office:value-type="float" office:value="97">
            <text:p>97</text:p>
          </table:table-cell>
          <table:table-cell office:value-type="string">
            <text:p>2026-03-31</text:p>
          </table:table-cell>
          <table:table-cell office:value-type="string">
            <text:p>Migracao do saldo atual para lotes: tm2609 - Mouse logitech com fio m90 (Qtd: 2)</text:p>
          </table:table-cell>
          <table:table-cell office:value-type="float" office:value="60">
            <text:p>60</text:p>
          </table:table-cell>
          <table:table-cell/>
          <table:table-cell/>
          <table:table-cell/>
        </table:table-row>
        <table:table-row>
          <table:table-cell office:value-type="float" office:value="96">
            <text:p>96</text:p>
          </table:table-cell>
          <table:table-cell office:value-type="string">
            <text:p>2026-03-31</text:p>
          </table:table-cell>
          <table:table-cell office:value-type="string">
            <text:p>Migracao do saldo atual para lotes: tm2508 - Mouse usb generico ou c3 multilaser (Qtd: 2)</text:p>
          </table:table-cell>
          <table:table-cell office:value-type="float" office:value="20">
            <text:p>20</text:p>
          </table:table-cell>
          <table:table-cell/>
          <table:table-cell/>
          <table:table-cell/>
        </table:table-row>
        <table:table-row>
          <table:table-cell office:value-type="float" office:value="95">
            <text:p>95</text:p>
          </table:table-cell>
          <table:table-cell office:value-type="string">
            <text:p>2026-03-31</text:p>
          </table:table-cell>
          <table:table-cell office:value-type="string">
            <text:p>Migracao do saldo atual para lotes: tm2209 - mousepad simples (Qtd: 3)</text:p>
          </table:table-cell>
          <table:table-cell office:value-type="float" office:value="11.1">
            <text:p>11.1</text:p>
          </table:table-cell>
          <table:table-cell/>
          <table:table-cell/>
          <table:table-cell/>
        </table:table-row>
        <table:table-row>
          <table:table-cell office:value-type="float" office:value="94">
            <text:p>94</text:p>
          </table:table-cell>
          <table:table-cell office:value-type="string">
            <text:p>2026-03-31</text:p>
          </table:table-cell>
          <table:table-cell office:value-type="string">
            <text:p>Migracao do saldo atual para lotes: tm2111 - Mouse pad diversos bichos (Qtd: 4)</text:p>
          </table:table-cell>
          <table:table-cell office:value-type="float" office:value="64">
            <text:p>64</text:p>
          </table:table-cell>
          <table:table-cell/>
          <table:table-cell/>
          <table:table-cell/>
        </table:table-row>
        <table:table-row>
          <table:table-cell office:value-type="float" office:value="93">
            <text:p>93</text:p>
          </table:table-cell>
          <table:table-cell office:value-type="string">
            <text:p>2026-03-31</text:p>
          </table:table-cell>
          <table:table-cell office:value-type="string">
            <text:p>Migracao do saldo atual para lotes: re2701 - adaptador USB para wifi com antena (Qtd: 1)</text:p>
          </table:table-cell>
          <table:table-cell office:value-type="float" office:value="60">
            <text:p>60</text:p>
          </table:table-cell>
          <table:table-cell/>
          <table:table-cell/>
          <table:table-cell/>
        </table:table-row>
        <table:table-row>
          <table:table-cell office:value-type="float" office:value="92">
            <text:p>92</text:p>
          </table:table-cell>
          <table:table-cell office:value-type="string">
            <text:p>2026-03-31</text:p>
          </table:table-cell>
          <table:table-cell office:value-type="string">
            <text:p>Migracao do saldo atual para lotes: re2409 - placa de rede tplink 150mpbs (Qtd: 1)</text:p>
          </table:table-cell>
          <table:table-cell office:value-type="float" office:value="48.74">
            <text:p>48.74</text:p>
          </table:table-cell>
          <table:table-cell/>
          <table:table-cell/>
          <table:table-cell/>
        </table:table-row>
        <table:table-row>
          <table:table-cell office:value-type="float" office:value="90">
            <text:p>90</text:p>
          </table:table-cell>
          <table:table-cell office:value-type="string">
            <text:p>2026-03-31</text:p>
          </table:table-cell>
          <table:table-cell office:value-type="string">
            <text:p>Migracao do saldo atual para lotes: mu5009 - webcam multilaser (Qtd: 1)</text:p>
          </table:table-cell>
          <table:table-cell office:value-type="float" office:value="26.9">
            <text:p>26.9</text:p>
          </table:table-cell>
          <table:table-cell/>
          <table:table-cell/>
          <table:table-cell/>
        </table:table-row>
        <table:table-row>
          <table:table-cell office:value-type="float" office:value="88">
            <text:p>88</text:p>
          </table:table-cell>
          <table:table-cell office:value-type="string">
            <text:p>2026-03-31</text:p>
          </table:table-cell>
          <table:table-cell office:value-type="string">
            <text:p>Migracao do saldo atual para lotes: mu4107 - Headphone P2 ou P3 medio (Qtd: 1)</text:p>
          </table:table-cell>
          <table:table-cell office:value-type="float" office:value="46">
            <text:p>46</text:p>
          </table:table-cell>
          <table:table-cell/>
          <table:table-cell/>
          <table:table-cell/>
        </table:table-row>
        <table:table-row>
          <table:table-cell office:value-type="float" office:value="87">
            <text:p>87</text:p>
          </table:table-cell>
          <table:table-cell office:value-type="string">
            <text:p>2026-03-31</text:p>
          </table:table-cell>
          <table:table-cell office:value-type="string">
            <text:p>Migracao do saldo atual para lotes: mu4005 - Headphone simples p2 (Qtd: 1)</text:p>
          </table:table-cell>
          <table:table-cell office:value-type="float" office:value="22">
            <text:p>22</text:p>
          </table:table-cell>
          <table:table-cell/>
          <table:table-cell/>
          <table:table-cell/>
        </table:table-row>
        <table:table-row>
          <table:table-cell office:value-type="float" office:value="86">
            <text:p>86</text:p>
          </table:table-cell>
          <table:table-cell office:value-type="string">
            <text:p>2026-03-31</text:p>
          </table:table-cell>
          <table:table-cell office:value-type="string">
            <text:p>Migracao do saldo atual para lotes: mu3410 - adaptador bluetooth para carro ou caixa de som (Qtd: 2)</text:p>
          </table:table-cell>
          <table:table-cell office:value-type="float" office:value="16">
            <text:p>16</text:p>
          </table:table-cell>
          <table:table-cell/>
          <table:table-cell/>
          <table:table-cell/>
        </table:table-row>
        <table:table-row>
          <table:table-cell office:value-type="float" office:value="85">
            <text:p>85</text:p>
          </table:table-cell>
          <table:table-cell office:value-type="string">
            <text:p>2026-03-31</text:p>
          </table:table-cell>
          <table:table-cell office:value-type="string">
            <text:p>Migracao do saldo atual para lotes: mu3307 - apresentador laserpoint (Qtd: 2)</text:p>
          </table:table-cell>
          <table:table-cell office:value-type="float" office:value="78">
            <text:p>78</text:p>
          </table:table-cell>
          <table:table-cell/>
          <table:table-cell/>
          <table:table-cell/>
        </table:table-row>
        <table:table-row>
          <table:table-cell office:value-type="float" office:value="84">
            <text:p>84</text:p>
          </table:table-cell>
          <table:table-cell office:value-type="string">
            <text:p>2026-03-31</text:p>
          </table:table-cell>
          <table:table-cell office:value-type="string">
            <text:p>Migracao do saldo atual para lotes: mu3210 - caixa de som knup 3w (Qtd: 1)</text:p>
          </table:table-cell>
          <table:table-cell office:value-type="float" office:value="21.25">
            <text:p>21.25</text:p>
          </table:table-cell>
          <table:table-cell/>
          <table:table-cell/>
          <table:table-cell/>
        </table:table-row>
        <table:table-row>
          <table:table-cell office:value-type="float" office:value="82">
            <text:p>82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7708 - Adaptador de áudio P2-F x P10-M ou contrario (Qtd: 2)</text:p>
          </table:table-cell>
          <table:table-cell office:value-type="float" office:value="8">
            <text:p>8</text:p>
          </table:table-cell>
          <table:table-cell/>
          <table:table-cell/>
          <table:table-cell/>
        </table:table-row>
        <table:table-row>
          <table:table-cell office:value-type="float" office:value="81">
            <text:p>81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7511 - Adaptador som p3 M x 2p2 F ou 2P2 M para P3 F (Qtd: 3)</text:p>
          </table:table-cell>
          <table:table-cell office:value-type="float" office:value="36">
            <text:p>36</text:p>
          </table:table-cell>
          <table:table-cell/>
          <table:table-cell/>
          <table:table-cell/>
        </table:table-row>
        <table:table-row>
          <table:table-cell office:value-type="float" office:value="80">
            <text:p>80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7211 - Conector RJ45 (Qtd: 21)</text:p>
          </table:table-cell>
          <table:table-cell office:value-type="float" office:value="21">
            <text:p>21</text:p>
          </table:table-cell>
          <table:table-cell/>
          <table:table-cell/>
          <table:table-cell/>
        </table:table-row>
        <table:table-row>
          <table:table-cell office:value-type="float" office:value="79">
            <text:p>79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6808 - HDMI x micro ou mini HDMI (Qtd: 3)</text:p>
          </table:table-cell>
          <table:table-cell office:value-type="float" office:value="24">
            <text:p>24</text:p>
          </table:table-cell>
          <table:table-cell/>
          <table:table-cell/>
          <table:table-cell/>
        </table:table-row>
        <table:table-row>
          <table:table-cell office:value-type="float" office:value="78">
            <text:p>78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6312 - Adaptador DVI para VGA (Qtd: 2)</text:p>
          </table:table-cell>
          <table:table-cell office:value-type="float" office:value="20">
            <text:p>20</text:p>
          </table:table-cell>
          <table:table-cell/>
          <table:table-cell/>
          <table:table-cell/>
        </table:table-row>
        <table:table-row>
          <table:table-cell office:value-type="float" office:value="77">
            <text:p>77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6208 - Adaptador de som para note com USB-C (Qtd: 1)</text:p>
          </table:table-cell>
          <table:table-cell office:value-type="float" office:value="13">
            <text:p>13</text:p>
          </table:table-cell>
          <table:table-cell/>
          <table:table-cell/>
          <table:table-cell/>
        </table:table-row>
        <table:table-row>
          <table:table-cell office:value-type="float" office:value="76">
            <text:p>76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6109 - Pasta termica revenger no pote (Qtd: 1)</text:p>
          </table:table-cell>
          <table:table-cell office:value-type="float" office:value="11">
            <text:p>11</text:p>
          </table:table-cell>
          <table:table-cell/>
          <table:table-cell/>
          <table:table-cell/>
        </table:table-row>
        <table:table-row>
          <table:table-cell office:value-type="float" office:value="75">
            <text:p>75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5908 - SATA dados/força no pote (Qtd: 21)</text:p>
          </table:table-cell>
          <table:table-cell office:value-type="float" office:value="42">
            <text:p>42</text:p>
          </table:table-cell>
          <table:table-cell/>
          <table:table-cell/>
          <table:table-cell/>
        </table:table-row>
        <table:table-row>
          <table:table-cell office:value-type="float" office:value="74">
            <text:p>74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5508 - Emenda P2 ou RCA (Qtd: 2)</text:p>
          </table:table-cell>
          <table:table-cell office:value-type="float" office:value="6">
            <text:p>6</text:p>
          </table:table-cell>
          <table:table-cell/>
          <table:table-cell/>
          <table:table-cell/>
        </table:table-row>
        <table:table-row>
          <table:table-cell office:value-type="float" office:value="73">
            <text:p>73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5408 - Adaptador  HDMI L 90°/ 270º ou direita (Qtd: 4)</text:p>
          </table:table-cell>
          <table:table-cell office:value-type="float" office:value="40">
            <text:p>40</text:p>
          </table:table-cell>
          <table:table-cell/>
          <table:table-cell/>
          <table:table-cell/>
        </table:table-row>
        <table:table-row>
          <table:table-cell office:value-type="float" office:value="72">
            <text:p>72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5308 - Adaptador Micro SD - Miudesas (sem conferência) (Qtd: 5)</text:p>
          </table:table-cell>
          <table:table-cell office:value-type="float" office:value="25">
            <text:p>25</text:p>
          </table:table-cell>
          <table:table-cell/>
          <table:table-cell/>
          <table:table-cell/>
        </table:table-row>
        <table:table-row>
          <table:table-cell office:value-type="float" office:value="71">
            <text:p>71</text:p>
          </table:table-cell>
          <table:table-cell office:value-type="string">
            <text:p>2026-03-31</text:p>
          </table:table-cell>
          <table:table-cell office:value-type="string">
            <text:p>Migracao do saldo atual para lotes: mi5207 - Adaptador USB C para Micro USB Femea (V8) (Qtd: 1)</text:p>
          </table:table-cell>
          <table:table-cell office:value-type="float" office:value="15">
            <text:p>15</text:p>
          </table:table-cell>
          <table:table-cell/>
          <table:table-cell/>
          <table:table-cell/>
        </table:table-row>
        <table:table-row>
          <table:table-cell office:value-type="float" office:value="69">
            <text:p>69</text:p>
          </table:table-cell>
          <table:table-cell office:value-type="string">
            <text:p>2026-03-31</text:p>
          </table:table-cell>
          <table:table-cell office:value-type="string">
            <text:p>Migracao do saldo atual para lotes: en4208 - Filtro de linha 5, 6 ou 8 tomadas (Qtd: 5)</text:p>
          </table:table-cell>
          <table:table-cell office:value-type="float" office:value="105">
            <text:p>105</text:p>
          </table:table-cell>
          <table:table-cell/>
          <table:table-cell/>
          <table:table-cell/>
        </table:table-row>
        <table:table-row>
          <table:table-cell office:value-type="float" office:value="68">
            <text:p>68</text:p>
          </table:table-cell>
          <table:table-cell office:value-type="string">
            <text:p>2026-03-31</text:p>
          </table:table-cell>
          <table:table-cell office:value-type="string">
            <text:p>Migracao do saldo atual para lotes: en2510 - Fonte comum kmex ou outra (Qtd: 4)</text:p>
          </table:table-cell>
          <table:table-cell office:value-type="float" office:value="196">
            <text:p>196</text:p>
          </table:table-cell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8302 - Kit i3 3th CPU+ Placa+Cooler+gab+m2 ou ssd (Qtd: 1)</text:p>
          </table:table-cell>
          <table:table-cell office:value-type="float" office:value="500">
            <text:p>500</text:p>
          </table:table-cell>
          <table:table-cell/>
          <table:table-cell/>
          <table:table-cell/>
        </table:table-row>
        <table:table-row>
          <table:table-cell office:value-type="float" office:value="64">
            <text:p>64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8108 - Adaptadores Diversos P2 P10 duplicador + ext (Qtd: 1)</text:p>
          </table:table-cell>
          <table:table-cell office:value-type="float" office:value="5">
            <text:p>5</text:p>
          </table:table-cell>
          <table:table-cell/>
          <table:table-cell/>
          <table:table-cell/>
        </table:table-row>
        <table:table-row>
          <table:table-cell office:value-type="float" office:value="63">
            <text:p>63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5608 - Limpa tela 60ml com e sem pano (Qtd: 1)</text:p>
          </table:table-cell>
          <table:table-cell office:value-type="float" office:value="12">
            <text:p>12</text:p>
          </table:table-cell>
          <table:table-cell/>
          <table:table-cell/>
          <table:table-cell/>
        </table:table-row>
        <table:table-row>
          <table:table-cell office:value-type="float" office:value="62">
            <text:p>62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4208 - hub usb 4 portas simples (Qtd: 3)</text:p>
          </table:table-cell>
          <table:table-cell office:value-type="float" office:value="35.7">
            <text:p>35.7</text:p>
          </table:table-cell>
          <table:table-cell/>
          <table:table-cell/>
          <table:table-cell/>
        </table:table-row>
        <table:table-row>
          <table:table-cell office:value-type="float" office:value="61">
            <text:p>61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4105 - Hub USB-C para 4 USB 3.0 (Qtd: 1)</text:p>
          </table:table-cell>
          <table:table-cell office:value-type="float" office:value="45">
            <text:p>45</text:p>
          </table:table-cell>
          <table:table-cell/>
          <table:table-cell/>
          <table:table-cell/>
        </table:table-row>
        <table:table-row>
          <table:table-cell office:value-type="float" office:value="60">
            <text:p>60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2108 - Conversor de HDMI para vga + audio (Qtd: 3)</text:p>
          </table:table-cell>
          <table:table-cell office:value-type="float" office:value="72">
            <text:p>72</text:p>
          </table:table-cell>
          <table:table-cell/>
          <table:table-cell/>
          <table:table-cell/>
        </table:table-row>
        <table:table-row>
          <table:table-cell office:value-type="float" office:value="59">
            <text:p>59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1808 - Luminaria usb (Qtd: 2)</text:p>
          </table:table-cell>
          <table:table-cell office:value-type="float" office:value="12">
            <text:p>12</text:p>
          </table:table-cell>
          <table:table-cell/>
          <table:table-cell/>
          <table:table-cell/>
        </table:table-row>
        <table:table-row>
          <table:table-cell office:value-type="float" office:value="58">
            <text:p>58</text:p>
          </table:table-cell>
          <table:table-cell office:value-type="string">
            <text:p>2026-03-31</text:p>
          </table:table-cell>
          <table:table-cell office:value-type="string">
            <text:p>Migracao do saldo atual para lotes: dv1605 - Gabinete aquario diversos (Qtd: 2)</text:p>
          </table:table-cell>
          <table:table-cell office:value-type="float" office:value="350">
            <text:p>350</text:p>
          </table:table-cell>
          <table:table-cell/>
          <table:table-cell/>
          <table:table-cell/>
        </table:table-row>
        <table:table-row>
          <table:table-cell office:value-type="float" office:value="56">
            <text:p>56</text:p>
          </table:table-cell>
          <table:table-cell office:value-type="string">
            <text:p>2026-03-31</text:p>
          </table:table-cell>
          <table:table-cell office:value-type="string">
            <text:p>Migracao do saldo atual para lotes: dr3605 - Pen Drive 32GB (Qtd: 2)</text:p>
          </table:table-cell>
          <table:table-cell office:value-type="float" office:value="34">
            <text:p>34</text:p>
          </table:table-cell>
          <table:table-cell/>
          <table:table-cell/>
          <table:table-cell/>
        </table:table-row>
        <table:table-row>
          <table:table-cell office:value-type="float" office:value="55">
            <text:p>55</text:p>
          </table:table-cell>
          <table:table-cell office:value-type="string">
            <text:p>2026-03-31</text:p>
          </table:table-cell>
          <table:table-cell office:value-type="string">
            <text:p>Migracao do saldo atual para lotes: dr3408 - Pen drive 2.0 16gb v42 3.0 v55 (Qtd: 2)</text:p>
          </table:table-cell>
          <table:table-cell office:value-type="float" office:value="44">
            <text:p>44</text:p>
          </table:table-cell>
          <table:table-cell/>
          <table:table-cell/>
          <table:table-cell/>
        </table:table-row>
        <table:table-row>
          <table:table-cell office:value-type="float" office:value="54">
            <text:p>54</text:p>
          </table:table-cell>
          <table:table-cell office:value-type="string">
            <text:p>2026-03-31</text:p>
          </table:table-cell>
          <table:table-cell office:value-type="string">
            <text:p>Migracao do saldo atual para lotes: ce8409 - carregador turbo IVON ou EKASA (Qtd: 1)</text:p>
          </table:table-cell>
          <table:table-cell office:value-type="float" office:value="44.9">
            <text:p>44.9</text:p>
          </table:table-cell>
          <table:table-cell/>
          <table:table-cell/>
          <table:table-cell/>
        </table:table-row>
        <table:table-row>
          <table:table-cell office:value-type="float" office:value="53">
            <text:p>53</text:p>
          </table:table-cell>
          <table:table-cell office:value-type="string">
            <text:p>2026-03-31</text:p>
          </table:table-cell>
          <table:table-cell office:value-type="string">
            <text:p>Migracao do saldo atual para lotes: ce7501 - cabo usb a computador para tipo c celular novo (Qtd: 2)</text:p>
          </table:table-cell>
          <table:table-cell office:value-type="float" office:value="20">
            <text:p>20</text:p>
          </table:table-cell>
          <table:table-cell/>
          <table:table-cell/>
          <table:table-cell/>
        </table:table-row>
        <table:table-row>
          <table:table-cell office:value-type="float" office:value="52">
            <text:p>52</text:p>
          </table:table-cell>
          <table:table-cell office:value-type="string">
            <text:p>2026-03-31</text:p>
          </table:table-cell>
          <table:table-cell office:value-type="string">
            <text:p>Migracao do saldo atual para lotes: ce7402 - Cabo USB A-M p/ Iphone 1,0M 5,0A (Qtd: 2)</text:p>
          </table:table-cell>
          <table:table-cell office:value-type="float" office:value="17.2">
            <text:p>17.2</text:p>
          </table:table-cell>
          <table:table-cell/>
          <table:table-cell/>
          <table:table-cell/>
        </table:table-row>
        <table:table-row>
          <table:table-cell office:value-type="float" office:value="51">
            <text:p>51</text:p>
          </table:table-cell>
          <table:table-cell office:value-type="string">
            <text:p>2026-03-31</text:p>
          </table:table-cell>
          <table:table-cell office:value-type="string">
            <text:p>Migracao do saldo atual para lotes: ce7201 - Cabo tipo C para tipo C (Qtd: 2)</text:p>
          </table:table-cell>
          <table:table-cell office:value-type="float" office:value="30">
            <text:p>30</text:p>
          </table:table-cell>
          <table:table-cell/>
          <table:table-cell/>
          <table:table-cell/>
        </table:table-row>
        <table:table-row>
          <table:table-cell office:value-type="float" office:value="50">
            <text:p>50</text:p>
          </table:table-cell>
          <table:table-cell office:value-type="string">
            <text:p>2026-03-31</text:p>
          </table:table-cell>
          <table:table-cell office:value-type="string">
            <text:p>Migracao do saldo atual para lotes: ce6610 - suporte de celular magnetico (Qtd: 1)</text:p>
          </table:table-cell>
          <table:table-cell office:value-type="float" office:value="20">
            <text:p>20</text:p>
          </table:table-cell>
          <table:table-cell/>
          <table:table-cell/>
          <table:table-cell/>
        </table:table-row>
        <table:table-row>
          <table:table-cell office:value-type="float" office:value="49">
            <text:p>49</text:p>
          </table:table-cell>
          <table:table-cell office:value-type="string">
            <text:p>2026-03-31</text:p>
          </table:table-cell>
          <table:table-cell office:value-type="string">
            <text:p>Migracao do saldo atual para lotes: ce6607 - suporte celular p/ braço (Qtd: 4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48">
            <text:p>48</text:p>
          </table:table-cell>
          <table:table-cell office:value-type="string">
            <text:p>2026-03-31</text:p>
          </table:table-cell>
          <table:table-cell office:value-type="string">
            <text:p>Migracao do saldo atual para lotes: ce6510 - suporte de celular para retrovisor (Qtd: 1)</text:p>
          </table:table-cell>
          <table:table-cell office:value-type="float" office:value="25">
            <text:p>25</text:p>
          </table:table-cell>
          <table:table-cell/>
          <table:table-cell/>
          <table:table-cell/>
        </table:table-row>
        <table:table-row>
          <table:table-cell office:value-type="float" office:value="47">
            <text:p>47</text:p>
          </table:table-cell>
          <table:table-cell office:value-type="string">
            <text:p>2026-03-31</text:p>
          </table:table-cell>
          <table:table-cell office:value-type="string">
            <text:p>Migracao do saldo atual para lotes: ce4009 - Fone de celular ou de computador - 2 cortes (Qtd: 2)</text:p>
          </table:table-cell>
          <table:table-cell office:value-type="float" office:value="14">
            <text:p>14</text:p>
          </table:table-cell>
          <table:table-cell/>
          <table:table-cell/>
          <table:table-cell/>
        </table:table-row>
        <table:table-row>
          <table:table-cell office:value-type="float" office:value="46">
            <text:p>46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8507 - usb x usb diversos tamanhos (Qtd: 7)</text:p>
          </table:table-cell>
          <table:table-cell office:value-type="float" office:value="70">
            <text:p>70</text:p>
          </table:table-cell>
          <table:table-cell/>
          <table:table-cell/>
          <table:table-cell/>
        </table:table-row>
        <table:table-row>
          <table:table-cell office:value-type="float" office:value="45">
            <text:p>45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8301 - Cx07 Cabo de energia desk (Qtd: 3)</text:p>
          </table:table-cell>
          <table:table-cell office:value-type="float" office:value="24">
            <text:p>24</text:p>
          </table:table-cell>
          <table:table-cell/>
          <table:table-cell/>
          <table:table-cell/>
        </table:table-row>
        <table:table-row>
          <table:table-cell office:value-type="float" office:value="44">
            <text:p>44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8201 - Cx06 Cabo bipolar (Qtd: 3)</text:p>
          </table:table-cell>
          <table:table-cell office:value-type="float" office:value="9">
            <text:p>9</text:p>
          </table:table-cell>
          <table:table-cell/>
          <table:table-cell/>
          <table:table-cell/>
        </table:table-row>
        <table:table-row>
          <table:table-cell office:value-type="float" office:value="43">
            <text:p>43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8101 - Cx06 Cabo de note 1m a 2,9m tripolar (Qtd: 3)</text:p>
          </table:table-cell>
          <table:table-cell office:value-type="float" office:value="21">
            <text:p>21</text:p>
          </table:table-cell>
          <table:table-cell/>
          <table:table-cell/>
          <table:table-cell/>
        </table:table-row>
        <table:table-row>
          <table:table-cell office:value-type="float" office:value="42">
            <text:p>42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6301 - Cx05  Cabo   EXTENSAO P2  varios tamanhos (Qtd: 10)</text:p>
          </table:table-cell>
          <table:table-cell office:value-type="float" office:value="50">
            <text:p>50</text:p>
          </table:table-cell>
          <table:table-cell/>
          <table:table-cell/>
          <table:table-cell/>
        </table:table-row>
        <table:table-row>
          <table:table-cell office:value-type="float" office:value="40">
            <text:p>40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5509 - Cx04 Extensão USB - 5m (Qtd: 2)</text:p>
          </table:table-cell>
          <table:table-cell office:value-type="float" office:value="43.8">
            <text:p>43.8</text:p>
          </table:table-cell>
          <table:table-cell/>
          <table:table-cell/>
          <table:table-cell/>
        </table:table-row>
        <table:table-row>
          <table:table-cell office:value-type="float" office:value="39">
            <text:p>39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5301 - Cx04 Extensão USB - 3m (Qtd: 6)</text:p>
          </table:table-cell>
          <table:table-cell office:value-type="float" office:value="72">
            <text:p>72</text:p>
          </table:table-cell>
          <table:table-cell/>
          <table:table-cell/>
          <table:table-cell/>
        </table:table-row>
        <table:table-row>
          <table:table-cell office:value-type="float" office:value="38">
            <text:p>38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5201 - Cx04 Extensão USB 1,5m (aproximadamente) (Qtd: 4)</text:p>
          </table:table-cell>
          <table:table-cell office:value-type="float" office:value="32">
            <text:p>32</text:p>
          </table:table-cell>
          <table:table-cell/>
          <table:table-cell/>
          <table:table-cell/>
        </table:table-row>
        <table:table-row>
          <table:table-cell office:value-type="float" office:value="37">
            <text:p>37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4305 - Cabo de Rede 10m Pronto de fábrica (Qtd: 1)</text:p>
          </table:table-cell>
          <table:table-cell office:value-type="float" office:value="50">
            <text:p>50</text:p>
          </table:table-cell>
          <table:table-cell/>
          <table:table-cell/>
          <table:table-cell/>
        </table:table-row>
        <table:table-row>
          <table:table-cell office:value-type="float" office:value="35">
            <text:p>35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3301 - CX02 Cabo VGA 3m (Qtd: 1)</text:p>
          </table:table-cell>
          <table:table-cell office:value-type="float" office:value="22">
            <text:p>22</text:p>
          </table:table-cell>
          <table:table-cell/>
          <table:table-cell/>
          <table:table-cell/>
        </table:table-row>
        <table:table-row>
          <table:table-cell office:value-type="float" office:value="36">
            <text:p>36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4101 - Cx03 Cabo de rede de 1m até 2,9m (Qtd: 6)</text:p>
          </table:table-cell>
          <table:table-cell office:value-type="float" office:value="18">
            <text:p>18</text:p>
          </table:table-cell>
          <table:table-cell/>
          <table:table-cell/>
          <table:table-cell/>
        </table:table-row>
        <table:table-row>
          <table:table-cell office:value-type="float" office:value="34">
            <text:p>34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3201 - CX02 Cabo VGA 1.5m (Qtd: 3)</text:p>
          </table:table-cell>
          <table:table-cell office:value-type="float" office:value="35.7">
            <text:p>35.7</text:p>
          </table:table-cell>
          <table:table-cell/>
          <table:table-cell/>
          <table:table-cell/>
        </table:table-row>
        <table:table-row>
          <table:table-cell office:value-type="float" office:value="33">
            <text:p>33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2403 - cx01 cabo hdmi Articulado (Qtd: 1)</text:p>
          </table:table-cell>
          <table:table-cell office:value-type="float" office:value="20">
            <text:p>20</text:p>
          </table:table-cell>
          <table:table-cell/>
          <table:table-cell/>
          <table:table-cell/>
        </table:table-row>
        <table:table-row>
          <table:table-cell office:value-type="float" office:value="32">
            <text:p>32</text:p>
          </table:table-cell>
          <table:table-cell office:value-type="string">
            <text:p>2026-03-31</text:p>
          </table:table-cell>
          <table:table-cell office:value-type="string">
            <text:p>Migracao do saldo atual para lotes: ca2312 - Cx01 cabo hdmi 4k 1,8M (Qtd: 5)</text:p>
          </table:table-cell>
          <table:table-cell office:value-type="float" office:value="72.5">
            <text:p>72.5</text:p>
          </table:table-cell>
          <table:table-cell/>
          <table:table-cell/>
          <table:table-cell/>
        </table:table-row>
        <table:table-row>
          <table:table-cell office:value-type="float" office:value="24">
            <text:p>24</text:p>
          </table:table-cell>
          <table:table-cell office:value-type="string">
            <text:p>2026-03-30</text:p>
          </table:table-cell>
          <table:table-cell office:value-type="string">
            <text:p>Migracao do saldo atual para lotes: 47 - Fonte Sony pino 6,5 - 4,0a - 16v (FT-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19">
            <text:p>19</text:p>
          </table:table-cell>
          <table:table-cell office:value-type="string">
            <text:p>2026-03-30</text:p>
          </table:table-cell>
          <table:table-cell office:value-type="string">
            <text:p>Migracao do saldo atual para lotes: 42 - Fonte Sansung pino 5,5 - 4,75a - 19v (FT88) (Qtd: 2)</text:p>
          </table:table-cell>
          <table:table-cell office:value-type="float" office:value="160">
            <text:p>160</text:p>
          </table:table-cell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string">
            <text:p>2026-03-30</text:p>
          </table:table-cell>
          <table:table-cell office:value-type="string">
            <text:p>Migracao do saldo atual para lotes: 41 - Fonte Sansung pino 5,5 - 3,16a - 19v (FT028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17">
            <text:p>17</text:p>
          </table:table-cell>
          <table:table-cell office:value-type="string">
            <text:p>2026-03-30</text:p>
          </table:table-cell>
          <table:table-cell office:value-type="string">
            <text:p>Migracao do saldo atual para lotes: 37 - Fonte acer pino 5,5 - 4,75a - 19v (FT003) (Qtd: 2)</text:p>
          </table:table-cell>
          <table:table-cell office:value-type="float" office:value="160">
            <text:p>160</text:p>
          </table:table-cell>
          <table:table-cell/>
          <table:table-cell/>
          <table:table-cell/>
        </table:table-row>
        <table:table-row>
          <table:table-cell office:value-type="float" office:value="15">
            <text:p>15</text:p>
          </table:table-cell>
          <table:table-cell office:value-type="string">
            <text:p>2026-03-30</text:p>
          </table:table-cell>
          <table:table-cell office:value-type="string">
            <text:p>Migracao do saldo atual para lotes: 35 - Fonte HP pino 4,8 - 3,33a - 19,5v (FT104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14">
            <text:p>14</text:p>
          </table:table-cell>
          <table:table-cell office:value-type="string">
            <text:p>2026-03-30</text:p>
          </table:table-cell>
          <table:table-cell office:value-type="string">
            <text:p>Migracao do saldo atual para lotes: 33 - Fonte HP/toshiba pino 4,8 - 4,74a - 19v (FT018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string">
            <text:p>2026-03-30</text:p>
          </table:table-cell>
          <table:table-cell office:value-type="string">
            <text:p>Migracao do saldo atual para lotes: 27 - Fonte Asus pino 4,8 - 3,0a - 12,8v (FT005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12">
            <text:p>12</text:p>
          </table:table-cell>
          <table:table-cell office:value-type="string">
            <text:p>2026-03-30</text:p>
          </table:table-cell>
          <table:table-cell office:value-type="string">
            <text:p>Migracao do saldo atual para lotes: 31 - Fonte HP pino 4,8 - 3,5a - 18,5v (FT016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31">
            <text:p>31</text:p>
          </table:table-cell>
          <table:table-cell office:value-type="string">
            <text:p>2026-03-30</text:p>
          </table:table-cell>
          <table:table-cell office:value-type="string">
            <text:p>Migracao do saldo atual para lotes: 58 - Fonte Monitor Diversos tronos, LG (Qtd: 3)</text:p>
          </table:table-cell>
          <table:table-cell office:value-type="float" office:value="240">
            <text:p>240</text:p>
          </table:table-cell>
          <table:table-cell/>
          <table:table-cell/>
          <table:table-cell/>
        </table:table-row>
        <table:table-row>
          <table:table-cell office:value-type="float" office:value="30">
            <text:p>30</text:p>
          </table:table-cell>
          <table:table-cell office:value-type="string">
            <text:p>2026-03-30</text:p>
          </table:table-cell>
          <table:table-cell office:value-type="string">
            <text:p>Migracao do saldo atual para lotes: 57 - Fonte Universal p/ Note (Qtd: 1)</text:p>
          </table:table-cell>
          <table:table-cell office:value-type="float" office:value="73.9">
            <text:p>73.9</text:p>
          </table:table-cell>
          <table:table-cell/>
          <table:table-cell/>
          <table:table-cell/>
        </table:table-row>
        <table:table-row>
          <table:table-cell office:value-type="float" office:value="28">
            <text:p>28</text:p>
          </table:table-cell>
          <table:table-cell office:value-type="string">
            <text:p>2026-03-30</text:p>
          </table:table-cell>
          <table:table-cell office:value-type="string">
            <text:p>Migracao do saldo atual para lotes: 55 - Fonte Celular/lenovo tipo c - 3,25a - 20v (FT170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27">
            <text:p>27</text:p>
          </table:table-cell>
          <table:table-cell office:value-type="string">
            <text:p>2026-03-30</text:p>
          </table:table-cell>
          <table:table-cell office:value-type="string">
            <text:p>Migracao do saldo atual para lotes: 54 - Fonte dell pino 7,4 - 4,62a - 19,5v (FT043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26">
            <text:p>26</text:p>
          </table:table-cell>
          <table:table-cell office:value-type="string">
            <text:p>2026-03-30</text:p>
          </table:table-cell>
          <table:table-cell office:value-type="string">
            <text:p>Migracao do saldo atual para lotes: 52 - Fonte HP pino 7,4 - 4,75a - 19v (FT017) (Qtd: 2)</text:p>
          </table:table-cell>
          <table:table-cell office:value-type="float" office:value="160">
            <text:p>160</text:p>
          </table:table-cell>
          <table:table-cell/>
          <table:table-cell/>
          <table:table-cell/>
        </table:table-row>
        <table:table-row>
          <table:table-cell office:value-type="float" office:value="25">
            <text:p>25</text:p>
          </table:table-cell>
          <table:table-cell office:value-type="string">
            <text:p>2026-03-30</text:p>
          </table:table-cell>
          <table:table-cell office:value-type="string">
            <text:p>Migracao do saldo atual para lotes: 51 - Fonte HP pino 7,4 - 3,5a - 18,5v (FT015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23">
            <text:p>23</text:p>
          </table:table-cell>
          <table:table-cell office:value-type="string">
            <text:p>2026-03-30</text:p>
          </table:table-cell>
          <table:table-cell office:value-type="string">
            <text:p>Migracao do saldo atual para lotes: 46 - Fonte LG pino 6 - 3,42a - 19v (FT0,92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22">
            <text:p>22</text:p>
          </table:table-cell>
          <table:table-cell office:value-type="string">
            <text:p>2026-03-30</text:p>
          </table:table-cell>
          <table:table-cell office:value-type="string">
            <text:p>Migracao do saldo atual para lotes: 45 - Fonte Toshiba/lenovo/cce pino 5,5 - 3,25a - 20v (FT008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string">
            <text:p>2026-03-30</text:p>
          </table:table-cell>
          <table:table-cell office:value-type="string">
            <text:p>Migracao do saldo atual para lotes: 44 - Fonte Toshiba/Itaút/Asus/positivo pino 5,5 - 3,75a - 19v (FT037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string">
            <text:p>2026-03-30</text:p>
          </table:table-cell>
          <table:table-cell office:value-type="string">
            <text:p>Migracao do saldo atual para lotes: 36 - Fonte acer pino 5,5 - 3,42a - 19v (FT002) (Qtd: 2)</text:p>
          </table:table-cell>
          <table:table-cell office:value-type="float" office:value="160">
            <text:p>160</text:p>
          </table:table-cell>
          <table:table-cell/>
          <table:table-cell/>
          <table:table-cell/>
        </table:table-row>
        <table:table-row>
          <table:table-cell office:value-type="float" office:value="13">
            <text:p>13</text:p>
          </table:table-cell>
          <table:table-cell office:value-type="string">
            <text:p>2026-03-30</text:p>
          </table:table-cell>
          <table:table-cell office:value-type="string">
            <text:p>Migracao do saldo atual para lotes: 32 - Fonte Philco pino 4,8 - 1,58a - 19v (FT117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  <table:table-row>
          <table:table-cell office:value-type="float" office:value="10">
            <text:p>10</text:p>
          </table:table-cell>
          <table:table-cell office:value-type="string">
            <text:p>2026-03-30</text:p>
          </table:table-cell>
          <table:table-cell office:value-type="string">
            <text:p>Migracao do saldo atual para lotes: 25 - Fonte Dell pino 4,5 - 3,34a - 19,5v (FT126) (Qtd: 3)</text:p>
          </table:table-cell>
          <table:table-cell office:value-type="float" office:value="240">
            <text:p>240</text:p>
          </table:table-cell>
          <table:table-cell/>
          <table:table-cell/>
          <table:table-cell/>
        </table:table-row>
        <table:table-row>
          <table:table-cell office:value-type="float" office:value="9">
            <text:p>9</text:p>
          </table:table-cell>
          <table:table-cell office:value-type="string">
            <text:p>2026-03-30</text:p>
          </table:table-cell>
          <table:table-cell office:value-type="string">
            <text:p>Migracao do saldo atual para lotes: 24 - Fonte HP pino 4,5 - 4,62a - 19,5v (FT113) (Qtd: 1)</text:p>
          </table:table-cell>
          <table:table-cell office:value-type="float" office:value="80">
            <text:p>80</text:p>
          </table:table-cell>
          <table:table-cell/>
          <table:table-cell/>
          <table:table-cell/>
        </table:table-row>
      </table:table>
      <table:table table:name="Ordens Servico">
        <table:table-row>
          <table:table-cell office:value-type="string">
            <text:p>id</text:p>
          </table:table-cell>
          <table:table-cell office:value-type="string">
            <text:p>codigo</text:p>
          </table:table-cell>
          <table:table-cell office:value-type="string">
            <text:p>cliente</text:p>
          </table:table-cell>
          <table:table-cell office:value-type="string">
            <text:p>telefone_cliente</text:p>
          </table:table-cell>
          <table:table-cell office:value-type="string">
            <text:p>equipamento</text:p>
          </table:table-cell>
          <table:table-cell office:value-type="string">
            <text:p>defeito</text:p>
          </table:table-cell>
          <table:table-cell office:value-type="string">
            <text:p>tecnico</text:p>
          </table:table-cell>
          <table:table-cell office:value-type="string">
            <text:p>status_os</text:p>
          </table:table-cell>
          <table:table-cell office:value-type="string">
            <text:p>status_aprovacao</text:p>
          </table:table-cell>
          <table:table-cell office:value-type="string">
            <text:p>total</text:p>
          </table:table-cell>
          <table:table-cell office:value-type="string">
            <text:p>aberto_em</text:p>
          </table:table-cell>
          <table:table-cell office:value-type="string">
            <text:p>concluido_em</text:p>
          </table:table-cell>
          <table:table-cell office:value-type="string">
            <text:p>atualizado_em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BE-2026-04-13-01</text:p>
          </table:table-cell>
          <table:table-cell office:value-type="string">
            <text:p>Leonardo</text:p>
          </table:table-cell>
          <table:table-cell office:value-type="string">
            <text:p>986266060</text:p>
          </table:table-cell>
          <table:table-cell office:value-type="string">
            <text:p>Deskotp i9</text:p>
          </table:table-cell>
          <table:table-cell office:value-type="string">
            <text:p>Pc não liga apenas luzes, fazer limpeza/testes</text:p>
          </table:table-cell>
          <table:table-cell/>
          <table:table-cell office:value-type="string">
            <text:p>CONCLUIDA</text:p>
          </table:table-cell>
          <table:table-cell office:value-type="string">
            <text:p>PRE_APROVADA</text:p>
          </table:table-cell>
          <table:table-cell office:value-type="float" office:value="400">
            <text:p>400</text:p>
          </table:table-cell>
          <table:table-cell office:value-type="string">
            <text:p>2026-04-13</text:p>
          </table:table-cell>
          <table:table-cell office:value-type="string">
            <text:p>2026-04-20</text:p>
          </table:table-cell>
          <table:table-cell office:value-type="string">
            <text:p>2026-04-20T13:23:00.787Z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BE-2026-04-14-01</text:p>
          </table:table-cell>
          <table:table-cell office:value-type="string">
            <text:p>Maira</text:p>
          </table:table-cell>
          <table:table-cell office:value-type="string">
            <text:p>984017024</text:p>
          </table:table-cell>
          <table:table-cell office:value-type="string">
            <text:p>Notebook LG</text:p>
          </table:table-cell>
          <table:table-cell office:value-type="string">
            <text:p>Carcaça</text:p>
          </table:table-cell>
          <table:table-cell/>
          <table:table-cell office:value-type="string">
            <text:p>CONCLUIDA</text:p>
          </table:table-cell>
          <table:table-cell office:value-type="string">
            <text:p>PRE_APROVADA</text:p>
          </table:table-cell>
          <table:table-cell office:value-type="float" office:value="0">
            <text:p>0</text:p>
          </table:table-cell>
          <table:table-cell office:value-type="string">
            <text:p>2026-04-14</text:p>
          </table:table-cell>
          <table:table-cell office:value-type="string">
            <text:p>2026-04-20</text:p>
          </table:table-cell>
          <table:table-cell office:value-type="string">
            <text:p>2026-04-20T13:22:43.614Z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BE-2026-04-09-01</text:p>
          </table:table-cell>
          <table:table-cell office:value-type="string">
            <text:p>Inacio</text:p>
          </table:table-cell>
          <table:table-cell office:value-type="string">
            <text:p>99627412</text:p>
          </table:table-cell>
          <table:table-cell office:value-type="string">
            <text:p>Note Dell 5480</text:p>
          </table:table-cell>
          <table:table-cell office:value-type="string">
            <text:p>Bateria ruim. Trocar, testar hd e memoria. Liga</text:p>
          </table:table-cell>
          <table:table-cell/>
          <table:table-cell office:value-type="string">
            <text:p>CONCLUIDA</text:p>
          </table:table-cell>
          <table:table-cell office:value-type="string">
            <text:p>AGUARDANDO_APROVACAO</text:p>
          </table:table-cell>
          <table:table-cell office:value-type="float" office:value="480">
            <text:p>480</text:p>
          </table:table-cell>
          <table:table-cell office:value-type="string">
            <text:p>2026-04-09</text:p>
          </table:table-cell>
          <table:table-cell office:value-type="string">
            <text:p>2026-04-15</text:p>
          </table:table-cell>
          <table:table-cell office:value-type="string">
            <text:p>2026-04-15T17:44:20.304Z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BE-2026-04-13-02</text:p>
          </table:table-cell>
          <table:table-cell office:value-type="string">
            <text:p>Helen</text:p>
          </table:table-cell>
          <table:table-cell office:value-type="string">
            <text:p>9646-0895</text:p>
          </table:table-cell>
          <table:table-cell office:value-type="string">
            <text:p>Notebook Lenovo</text:p>
          </table:table-cell>
          <table:table-cell office:value-type="string">
            <text:p>AutoCad não funciona</text:p>
          </table:table-cell>
          <table:table-cell/>
          <table:table-cell office:value-type="string">
            <text:p>CONCLUIDA</text:p>
          </table:table-cell>
          <table:table-cell office:value-type="string">
            <text:p>PRE_APROVADA</text:p>
          </table:table-cell>
          <table:table-cell office:value-type="float" office:value="30">
            <text:p>30</text:p>
          </table:table-cell>
          <table:table-cell office:value-type="string">
            <text:p>2026-04-13</text:p>
          </table:table-cell>
          <table:table-cell office:value-type="string">
            <text:p>2026-04-15</text:p>
          </table:table-cell>
          <table:table-cell office:value-type="string">
            <text:p>2026-04-15T17:42:38.713Z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BE-2026-04-08-01</text:p>
          </table:table-cell>
          <table:table-cell office:value-type="string">
            <text:p>Henrique</text:p>
          </table:table-cell>
          <table:table-cell office:value-type="string">
            <text:p>973612678</text:p>
          </table:table-cell>
          <table:table-cell office:value-type="string">
            <text:p>Note Ibm</text:p>
          </table:table-cell>
          <table:table-cell office:value-type="string">
            <text:p>Não da boot tentar recuperar SSD</text:p>
          </table:table-cell>
          <table:table-cell/>
          <table:table-cell office:value-type="string">
            <text:p>CONCLUIDA</text:p>
          </table:table-cell>
          <table:table-cell office:value-type="string">
            <text:p>AGUARDANDO_APROVACAO</text:p>
          </table:table-cell>
          <table:table-cell office:value-type="float" office:value="200">
            <text:p>200</text:p>
          </table:table-cell>
          <table:table-cell office:value-type="string">
            <text:p>2026-04-08</text:p>
          </table:table-cell>
          <table:table-cell office:value-type="string">
            <text:p>2026-04-13</text:p>
          </table:table-cell>
          <table:table-cell office:value-type="string">
            <text:p>2026-04-13T16:35:21.056Z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BE-2026-04-07-05</text:p>
          </table:table-cell>
          <table:table-cell office:value-type="string">
            <text:p>Angela</text:p>
          </table:table-cell>
          <table:table-cell office:value-type="string">
            <text:p>9 9633-1908 /  9 8628-9950</text:p>
          </table:table-cell>
          <table:table-cell office:value-type="string">
            <text:p>Desktop</text:p>
          </table:table-cell>
          <table:table-cell office:value-type="string">
            <text:p>Sem defeitos</text:p>
          </table:table-cell>
          <table:table-cell/>
          <table:table-cell office:value-type="string">
            <text:p>CONCLUIDA</text:p>
          </table:table-cell>
          <table:table-cell office:value-type="string">
            <text:p>PRE_APROVADA</text:p>
          </table:table-cell>
          <table:table-cell office:value-type="float" office:value="150">
            <text:p>150</text:p>
          </table:table-cell>
          <table:table-cell office:value-type="string">
            <text:p>2026-04-07</text:p>
          </table:table-cell>
          <table:table-cell office:value-type="string">
            <text:p>2026-04-09</text:p>
          </table:table-cell>
          <table:table-cell office:value-type="string">
            <text:p>2026-04-09T16:21:54.056Z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BE-2026-04-07-02</text:p>
          </table:table-cell>
          <table:table-cell office:value-type="string">
            <text:p>Edna</text:p>
          </table:table-cell>
          <table:table-cell office:value-type="string">
            <text:p>9 9224-8909</text:p>
          </table:table-cell>
          <table:table-cell office:value-type="string">
            <text:p>Notebook Dell</text:p>
          </table:table-cell>
          <table:table-cell office:value-type="string">
            <text:p>Sem defeitos</text:p>
          </table:table-cell>
          <table:table-cell/>
          <table:table-cell office:value-type="string">
            <text:p>CONCLUIDA</text:p>
          </table:table-cell>
          <table:table-cell office:value-type="string">
            <text:p>PRE_APROVADA</text:p>
          </table:table-cell>
          <table:table-cell office:value-type="float" office:value="150">
            <text:p>150</text:p>
          </table:table-cell>
          <table:table-cell office:value-type="string">
            <text:p>2026-04-07</text:p>
          </table:table-cell>
          <table:table-cell office:value-type="string">
            <text:p>2026-04-07</text:p>
          </table:table-cell>
          <table:table-cell office:value-type="string">
            <text:p>2026-04-07T21:37:13.571Z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BE-2026-04-07-01</text:p>
          </table:table-cell>
          <table:table-cell office:value-type="string">
            <text:p>Conrrado</text:p>
          </table:table-cell>
          <table:table-cell office:value-type="string">
            <text:p>33375574</text:p>
          </table:table-cell>
          <table:table-cell office:value-type="string">
            <text:p>Desktop</text:p>
          </table:table-cell>
          <table:table-cell office:value-type="string">
            <text:p>Sem defeitos</text:p>
          </table:table-cell>
          <table:table-cell/>
          <table:table-cell office:value-type="string">
            <text:p>CONCLUIDA</text:p>
          </table:table-cell>
          <table:table-cell office:value-type="string">
            <text:p>PRE_APROVADA</text:p>
          </table:table-cell>
          <table:table-cell office:value-type="float" office:value="150">
            <text:p>150</text:p>
          </table:table-cell>
          <table:table-cell office:value-type="string">
            <text:p>2026-04-07</text:p>
          </table:table-cell>
          <table:table-cell office:value-type="string">
            <text:p>2026-04-07</text:p>
          </table:table-cell>
          <table:table-cell office:value-type="string">
            <text:p>2026-04-07T21:36:55.279Z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BE-2026-04-07-03</text:p>
          </table:table-cell>
          <table:table-cell office:value-type="string">
            <text:p>Fabio Junqueira</text:p>
          </table:table-cell>
          <table:table-cell office:value-type="string">
            <text:p>9 8864-8843</text:p>
          </table:table-cell>
          <table:table-cell office:value-type="string">
            <text:p>Desktop</text:p>
          </table:table-cell>
          <table:table-cell office:value-type="string">
            <text:p>Nenhum defeito</text:p>
          </table:table-cell>
          <table:table-cell/>
          <table:table-cell office:value-type="string">
            <text:p>CONCLUIDA</text:p>
          </table:table-cell>
          <table:table-cell office:value-type="string">
            <text:p>PRE_APROVADA</text:p>
          </table:table-cell>
          <table:table-cell office:value-type="float" office:value="0">
            <text:p>0</text:p>
          </table:table-cell>
          <table:table-cell office:value-type="string">
            <text:p>2026-04-07</text:p>
          </table:table-cell>
          <table:table-cell office:value-type="string">
            <text:p>2026-04-07</text:p>
          </table:table-cell>
          <table:table-cell office:value-type="string">
            <text:p>2026-04-07T21:36:35.251Z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BE-2026-04-07-04</text:p>
          </table:table-cell>
          <table:table-cell office:value-type="string">
            <text:p>Leopoldo</text:p>
          </table:table-cell>
          <table:table-cell office:value-type="string">
            <text:p>9 9974-8899</text:p>
          </table:table-cell>
          <table:table-cell office:value-type="string">
            <text:p>Desktop</text:p>
          </table:table-cell>
          <table:table-cell office:value-type="string">
            <text:p>Computador não liga</text:p>
          </table:table-cell>
          <table:table-cell/>
          <table:table-cell office:value-type="string">
            <text:p>CONCLUIDA</text:p>
          </table:table-cell>
          <table:table-cell office:value-type="string">
            <text:p>PRE_APROVADA</text:p>
          </table:table-cell>
          <table:table-cell office:value-type="float" office:value="350">
            <text:p>350</text:p>
          </table:table-cell>
          <table:table-cell office:value-type="string">
            <text:p>2026-04-07</text:p>
          </table:table-cell>
          <table:table-cell office:value-type="string">
            <text:p>2026-04-07</text:p>
          </table:table-cell>
          <table:table-cell office:value-type="string">
            <text:p>2026-04-07T21:36:14.029Z</text:p>
          </table:table-cell>
        </table:table-row>
      </table:table>
      <table:table table:name="Itens OS">
        <table:table-row>
          <table:table-cell office:value-type="string">
            <text:p>sem_dados</text:p>
          </table:table-cell>
        </table:table-row>
        <table:table-row>
          <table:table-cell office:value-type="string">
            <text:p>Nenhum registro encontrado.</text:p>
          </table:table-cell>
        </table:table-row>
      </table:table>
      <table:table table:name="Clientes">
        <table:table-row>
          <table:table-cell office:value-type="string">
            <text:p>id</text:p>
          </table:table-cell>
          <table:table-cell office:value-type="string">
            <text:p>nome</text:p>
          </table:table-cell>
          <table:table-cell office:value-type="string">
            <text:p>telefone</text:p>
          </table:table-cell>
          <table:table-cell office:value-type="string">
            <text:p>email</text:p>
          </table:table-cell>
          <table:table-cell office:value-type="string">
            <text:p>documento</text:p>
          </table:table-cell>
          <table:table-cell office:value-type="string">
            <text:p>endereco</text:p>
          </table:table-cell>
          <table:table-cell office:value-type="string">
            <text:p>pedidos</text:p>
          </table:table-cell>
          <table:table-cell office:value-type="string">
            <text:p>gasto_total</text:p>
          </table:table-cell>
          <table:table-cell office:value-type="string">
            <text:p>pedidos_abertos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Leonardo</text:p>
          </table:table-cell>
          <table:table-cell office:value-type="string">
            <text:p>986266060</text:p>
          </table:table-cell>
          <table:table-cell/>
          <table:table-cell/>
          <table:table-cell office:value-type="string">
            <text:p>Rua Penafiel 320, Anchieta- apto 102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Maira</text:p>
          </table:table-cell>
          <table:table-cell office:value-type="string">
            <text:p>984017024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Conrrado</text:p>
          </table:table-cell>
          <table:table-cell office:value-type="string">
            <text:p>3337-5574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Conrrado</text:p>
          </table:table-cell>
          <table:table-cell office:value-type="string">
            <text:p>3337-5574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Edna</text:p>
          </table:table-cell>
          <table:table-cell office:value-type="string">
            <text:p>992248909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Leopoldo</text:p>
          </table:table-cell>
          <table:table-cell office:value-type="string">
            <text:p>9 9974-8899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Inacio</text:p>
          </table:table-cell>
          <table:table-cell office:value-type="string">
            <text:p>99627412</text:p>
          </table:table-cell>
          <table:table-cell/>
          <table:table-cell/>
          <table:table-cell office:value-type="string">
            <text:p>Rua Abadessa gertrudes- n 155- apto 1303 - Prado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Helen</text:p>
          </table:table-cell>
          <table:table-cell office:value-type="string">
            <text:p>9646-0895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Henrique</text:p>
          </table:table-cell>
          <table:table-cell office:value-type="string">
            <text:p>973612678</text:p>
          </table:table-cell>
          <table:table-cell/>
          <table:table-cell/>
          <table:table-cell office:value-type="string">
            <text:p>Rua Aloisio Lobão Veras 237 apt 404 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Angela</text:p>
          </table:table-cell>
          <table:table-cell office:value-type="string">
            <text:p>9 9633-1908 /  9 8628-9950</text:p>
          </table:table-cell>
          <table:table-cell/>
          <table:table-cell/>
          <table:table-cell office:value-type="string">
            <text:p>rua bernardo guimaraes 3080 apt 802- Santo Agostinho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Edna</text:p>
          </table:table-cell>
          <table:table-cell office:value-type="string">
            <text:p>9 9224-8909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onrrado</text:p>
          </table:table-cell>
          <table:table-cell office:value-type="string">
            <text:p>33375574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Fabio Junqueira</text:p>
          </table:table-cell>
          <table:table-cell office:value-type="string">
            <text:p>9 8864-8843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Leopoldo</text:p>
          </table:table-cell>
          <table:table-cell office:value-type="string">
            <text:p>9 9974-8899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onrrado</text:p>
          </table:table-cell>
          <table:table-cell office:value-type="string">
            <text:p>33375574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daniel</text:p>
          </table:table-cell>
          <table:table-cell office:value-type="string">
            <text:p>31997491178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Gabriel Aquino</text:p>
          </table:table-cell>
          <table:table-cell office:value-type="string">
            <text:p>992570461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Vendas PDV">
        <table:table-row>
          <table:table-cell office:value-type="string">
            <text:p>id</text:p>
          </table:table-cell>
          <table:table-cell office:value-type="string">
            <text:p>codigo</text:p>
          </table:table-cell>
          <table:table-cell office:value-type="string">
            <text:p>cliente</text:p>
          </table:table-cell>
          <table:table-cell office:value-type="string">
            <text:p>operador</text:p>
          </table:table-cell>
          <table:table-cell office:value-type="string">
            <text:p>subtotal</text:p>
          </table:table-cell>
          <table:table-cell office:value-type="string">
            <text:p>desconto</text:p>
          </table:table-cell>
          <table:table-cell office:value-type="string">
            <text:p>total</text:p>
          </table:table-cell>
          <table:table-cell office:value-type="string">
            <text:p>formas_pagamento</text:p>
          </table:table-cell>
          <table:table-cell office:value-type="string">
            <text:p>troco</text:p>
          </table:table-cell>
          <table:table-cell office:value-type="string">
            <text:p>criado_em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PDV-20260430-0002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30T14:20:48.944-03:00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PDV-20260430-0001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30T12:57:45.992-03:00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PDV-20260429-0002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9T19:32:18.665-03:00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PDV-20260429-0001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9T16:03:02.333-03:00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PDV-20260427-0003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7T16:26:21.526-03:00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PDV-20260427-0002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7T16:25:35.948-03:00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PDV-20260427-0001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7T16:24:55.713-03:00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PDV-20260424-0001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650">
            <text:p>6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4T13:56:22.328-03:00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PDV-20260423-0003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3T22:55:44.640Z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PDV-20260423-0002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3T20:45:27.394Z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PDV-20260423-0004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3T20:32:40.604-03:00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PDV-20260423-0001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3T16:42:23.264Z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PDV-20260422-0002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2T20:18:30.483Z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PDV-20260422-0001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2T20:01:58.087Z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PDV-20260420-0002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0T19:39:07.949Z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PDV-20260420-0001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20T14:42:01.827Z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PDV-20260418-0001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18T15:01:07.691Z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PDV-20260417-0002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17T21:37:12.854Z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PDV-20260417-0001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17T20:16:44.453Z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PDV-20260416-0007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16T19:31:08.008Z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PDV-20260416-0006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16T19:30:03.164Z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PDV-20260416-0005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16T19:28:54.697Z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PDV-20260416-0004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16T18:50:47.387Z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PDV-20260416-0003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16T18:46:53.704Z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PDV-20260416-0002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950">
            <text:p>950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16T18:43:47.324Z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PDV-20260416-0001</text:p>
          </table:table-cell>
          <table:table-cell office:value-type="string">
            <text:p>Cliente sem cadastro</text:p>
          </table:table-cell>
          <table:table-cell office:value-type="string">
            <text:p>Loja Principal</text:p>
          </table:table-cell>
          <table:table-cell office:value-type="float" office:value="4530">
            <text:p>4530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2026-04-16T18:38:21.823Z</text:p>
          </table:table-cell>
        </table:table-row>
      </table:table>
      <table:table table:name="Itens PDV">
        <table:table-row>
          <table:table-cell office:value-type="string">
            <text:p>id</text:p>
          </table:table-cell>
          <table:table-cell office:value-type="string">
            <text:p>venda_id</text:p>
          </table:table-cell>
          <table:table-cell office:value-type="string">
            <text:p>codigo_venda</text:p>
          </table:table-cell>
          <table:table-cell office:value-type="string">
            <text:p>tipo_item</text:p>
          </table:table-cell>
          <table:table-cell office:value-type="string">
            <text:p>catalogo_id</text:p>
          </table:table-cell>
          <table:table-cell office:value-type="string">
            <text:p>servico_id</text:p>
          </table:table-cell>
          <table:table-cell office:value-type="string">
            <text:p>descricao</text:p>
          </table:table-cell>
          <table:table-cell office:value-type="string">
            <text:p>quantidade</text:p>
          </table:table-cell>
          <table:table-cell office:value-type="string">
            <text:p>custo_unitario</text:p>
          </table:table-cell>
          <table:table-cell office:value-type="string">
            <text:p>preco_unitario</text:p>
          </table:table-cell>
          <table:table-cell office:value-type="string">
            <text:p>total_linha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PDV-20260416-0001</text:p>
          </table:table-cell>
          <table:table-cell office:value-type="string">
            <text:p>SERVICE</text:p>
          </table:table-cell>
          <table:table-cell/>
          <table:table-cell/>
          <table:table-cell office:value-type="string">
            <text:p>Todas as vendas sem produtos 16 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4530">
            <text:p>453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PDV-20260416-0002</text:p>
          </table:table-cell>
          <table:table-cell office:value-type="string">
            <text:p>SERVICE</text:p>
          </table:table-cell>
          <table:table-cell/>
          <table:table-cell/>
          <table:table-cell office:value-type="string">
            <text:p>Serviço memoria Marcos 6 and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office:value-type="float" office:value="950">
            <text:p>95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PDV-20260416-0003</text:p>
          </table:table-cell>
          <table:table-cell office:value-type="string">
            <text:p>PRODUCT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mi7008 - Leitor de cartão SD (de celular)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string">
            <text:p>PDV-20260416-0004</text:p>
          </table:table-cell>
          <table:table-cell office:value-type="string">
            <text:p>PRODUCT</text:p>
          </table:table-cell>
          <table:table-cell office:value-type="float" office:value="152">
            <text:p>152</text:p>
          </table:table-cell>
          <table:table-cell/>
          <table:table-cell office:value-type="string">
            <text:p>16 - Fonte HP/Asus pino 4 - 3,25a - 19v (FW183)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PDV-20260416-0005</text:p>
          </table:table-cell>
          <table:table-cell office:value-type="string">
            <text:p>PRODUCT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en2402 - Fonte real pcwells 550 - 501 ou outra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220">
            <text:p>220</text:p>
          </table:table-cell>
          <table:table-cell office:value-type="float" office:value="220">
            <text:p>22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PDV-20260416-0006</text:p>
          </table:table-cell>
          <table:table-cell office:value-type="string">
            <text:p>PRODUCT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dr3502 - Pen drive 8gb multi prata</text:p>
          </table:table-cell>
          <table:table-cell office:value-type="float" office:value="1">
            <text:p>1</text:p>
          </table:table-cell>
          <table:table-cell office:value-type="float" office:value="19.9">
            <text:p>19.9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string">
            <text:p>PDV-20260416-0007</text:p>
          </table:table-cell>
          <table:table-cell office:value-type="string">
            <text:p>PRODUCT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56 - Fonte Lenovo retangular - 3,25a- 20v (FT103)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string">
            <text:p>PDV-20260417-0001</text:p>
          </table:table-cell>
          <table:table-cell office:value-type="string">
            <text:p>SERVIC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ormatação sem backu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string">
            <text:p>PDV-20260417-0002</text:p>
          </table:table-cell>
          <table:table-cell office:value-type="string">
            <text:p>SERVICE</text:p>
          </table:table-cell>
          <table:table-cell/>
          <table:table-cell/>
          <table:table-cell office:value-type="string">
            <text:p>Serviço J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00">
            <text:p>50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PDV-20260418-0001</text:p>
          </table:table-cell>
          <table:table-cell office:value-type="string">
            <text:p>SERVIC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rviço basico informat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PDV-20260420-0001</text:p>
          </table:table-cell>
          <table:table-cell office:value-type="string">
            <text:p>PRODUC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46 - Fonte LG pino 6 - 3,42a - 19v (FT0,92)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string">
            <text:p>PDV-20260420-0002</text:p>
          </table:table-cell>
          <table:table-cell office:value-type="string">
            <text:p>SERVIC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mpressã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string">
            <text:p>PDV-20260422-0001</text:p>
          </table:table-cell>
          <table:table-cell office:value-type="string">
            <text:p>SERVIC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mpressã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string">
            <text:p>PDV-20260422-0001</text:p>
          </table:table-cell>
          <table:table-cell office:value-type="string">
            <text:p>SERVIC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A partir da segunda folha de impressã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string">
            <text:p>PDV-20260422-0002</text:p>
          </table:table-cell>
          <table:table-cell office:value-type="string">
            <text:p>PRODUCT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Tm8877- Teclado com fio C3 Tech</text:p>
          </table:table-cell>
          <table:table-cell office:value-type="float" office:value="1">
            <text:p>1</text:p>
          </table:table-cell>
          <table:table-cell office:value-type="float" office:value="18.5">
            <text:p>18.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string">
            <text:p>PDV-20260423-0001</text:p>
          </table:table-cell>
          <table:table-cell office:value-type="string">
            <text:p>PRODUCT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tm2209 - mousepad simples</text:p>
          </table:table-cell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string">
            <text:p>PDV-20260423-0002</text:p>
          </table:table-cell>
          <table:table-cell office:value-type="string">
            <text:p>PRODUCT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tm2209 - mousepad simples</text:p>
          </table:table-cell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string">
            <text:p>PDV-20260423-0002</text:p>
          </table:table-cell>
          <table:table-cell office:value-type="string">
            <text:p>SERVICE</text:p>
          </table:table-cell>
          <table:table-cell/>
          <table:table-cell/>
          <table:table-cell office:value-type="string">
            <text:p>Serviço úni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string">
            <text:p>PDV-20260423-0003</text:p>
          </table:table-cell>
          <table:table-cell office:value-type="string">
            <text:p>PRODUCT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co2016 - Base para notebook com cooler C3TECH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PDV-20260423-0003</text:p>
          </table:table-cell>
          <table:table-cell office:value-type="string">
            <text:p>PRODUCT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dv4105 - Hub USB-C para 4 USB 3.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PDV-20260423-0003</text:p>
          </table:table-cell>
          <table:table-cell office:value-type="string">
            <text:p>SERVIC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Limpez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string">
            <text:p>PDV-20260423-0004</text:p>
          </table:table-cell>
          <table:table-cell office:value-type="string">
            <text:p>PRODUCT</text:p>
          </table:table-cell>
          <table:table-cell office:value-type="float" office:value="227">
            <text:p>227</text:p>
          </table:table-cell>
          <table:table-cell/>
          <table:table-cell office:value-type="string">
            <text:p>co5566 - Cooler para processador intel/Amd</text:p>
          </table:table-cell>
          <table:table-cell office:value-type="float" office:value="1">
            <text:p>1</text:p>
          </table:table-cell>
          <table:table-cell office:value-type="float" office:value="14.6">
            <text:p>14.6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PDV-20260424-0001</text:p>
          </table:table-cell>
          <table:table-cell office:value-type="string">
            <text:p>SERVICE</text:p>
          </table:table-cell>
          <table:table-cell/>
          <table:table-cell/>
          <table:table-cell office:value-type="string">
            <text:p>Serviço Nils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0">
            <text:p>650</text:p>
          </table:table-cell>
          <table:table-cell office:value-type="float" office:value="650">
            <text:p>65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PDV-20260427-0001</text:p>
          </table:table-cell>
          <table:table-cell office:value-type="string">
            <text:p>SERVICE</text:p>
          </table:table-cell>
          <table:table-cell/>
          <table:table-cell/>
          <table:table-cell office:value-type="string">
            <text:p>venda placa de vide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string">
            <text:p>PDV-20260427-0002</text:p>
          </table:table-cell>
          <table:table-cell office:value-type="string">
            <text:p>SERVIC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mpressã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PDV-20260427-0003</text:p>
          </table:table-cell>
          <table:table-cell office:value-type="string">
            <text:p>PRODUCT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mu5452 - Fone de ouvido Simple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string">
            <text:p>PDV-20260427-0003</text:p>
          </table:table-cell>
          <table:table-cell office:value-type="string">
            <text:p>SERVIC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rviço basico informat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string">
            <text:p>PDV-20260429-0001</text:p>
          </table:table-cell>
          <table:table-cell office:value-type="string">
            <text:p>SERVIC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mpressã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string">
            <text:p>PDV-20260429-0002</text:p>
          </table:table-cell>
          <table:table-cell office:value-type="string">
            <text:p>SERVICE</text:p>
          </table:table-cell>
          <table:table-cell/>
          <table:table-cell/>
          <table:table-cell office:value-type="string">
            <text:p>Vga Us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string">
            <text:p>PDV-20260430-0001</text:p>
          </table:table-cell>
          <table:table-cell office:value-type="string">
            <text:p>SERVICE</text:p>
          </table:table-cell>
          <table:table-cell/>
          <table:table-cell/>
          <table:table-cell office:value-type="string">
            <text:p>Concerto de dobradiç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400">
            <text:p>40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string">
            <text:p>PDV-20260430-0002</text:p>
          </table:table-cell>
          <table:table-cell office:value-type="string">
            <text:p>SERVIC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Limpez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</table:table-row>
      </table:table>
      <table:table table:name="Pagamentos PDV">
        <table:table-row>
          <table:table-cell office:value-type="string">
            <text:p>id</text:p>
          </table:table-cell>
          <table:table-cell office:value-type="string">
            <text:p>venda_id</text:p>
          </table:table-cell>
          <table:table-cell office:value-type="string">
            <text:p>codigo_venda</text:p>
          </table:table-cell>
          <table:table-cell office:value-type="string">
            <text:p>forma_pagamento</text:p>
          </table:table-cell>
          <table:table-cell office:value-type="string">
            <text:p>valor</text:p>
          </table:table-cell>
          <table:table-cell office:value-type="string">
            <text:p>criado_em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>
            <text:p>PDV-20260416-0001</text:p>
          </table:table-cell>
          <table:table-cell office:value-type="string">
            <text:p>MAQ_AMARELA_PIX_CEL</text:p>
          </table:table-cell>
          <table:table-cell office:value-type="float" office:value="4530">
            <text:p>4530</text:p>
          </table:table-cell>
          <table:table-cell office:value-type="string">
            <text:p>2026-04-16T18:38:21.823Z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>
            <text:p>PDV-20260416-0002</text:p>
          </table:table-cell>
          <table:table-cell office:value-type="string">
            <text:p>MAQ_AMARELA_PIX_CEL</text:p>
          </table:table-cell>
          <table:table-cell office:value-type="float" office:value="950">
            <text:p>950</text:p>
          </table:table-cell>
          <table:table-cell office:value-type="string">
            <text:p>2026-04-16T18:43:47.324Z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string">
            <text:p>PDV-20260416-0003</text:p>
          </table:table-cell>
          <table:table-cell office:value-type="string">
            <text:p>MAQ_AMARELA_PIX_CEL</text:p>
          </table:table-cell>
          <table:table-cell office:value-type="float" office:value="25">
            <text:p>25</text:p>
          </table:table-cell>
          <table:table-cell office:value-type="string">
            <text:p>2026-04-16T18:46:53.704Z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>
            <text:p>PDV-20260416-0004</text:p>
          </table:table-cell>
          <table:table-cell office:value-type="string">
            <text:p>OUTROS_REGINA</text:p>
          </table:table-cell>
          <table:table-cell office:value-type="float" office:value="550">
            <text:p>550</text:p>
          </table:table-cell>
          <table:table-cell office:value-type="string">
            <text:p>2026-04-16T18:50:47.387Z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>
            <text:p>PDV-20260416-0005</text:p>
          </table:table-cell>
          <table:table-cell office:value-type="string">
            <text:p>MAQ_AMARELA_PIX_CEL</text:p>
          </table:table-cell>
          <table:table-cell office:value-type="float" office:value="220">
            <text:p>220</text:p>
          </table:table-cell>
          <table:table-cell office:value-type="string">
            <text:p>2026-04-16T19:28:54.697Z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>
            <text:p>PDV-20260416-0006</text:p>
          </table:table-cell>
          <table:table-cell office:value-type="string">
            <text:p>MAQ_AMARELA_PIX_CEL</text:p>
          </table:table-cell>
          <table:table-cell office:value-type="float" office:value="30">
            <text:p>30</text:p>
          </table:table-cell>
          <table:table-cell office:value-type="string">
            <text:p>2026-04-16T19:30:03.164Z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string">
            <text:p>PDV-20260416-0007</text:p>
          </table:table-cell>
          <table:table-cell office:value-type="string">
            <text:p>ARTHUR</text:p>
          </table:table-cell>
          <table:table-cell office:value-type="float" office:value="140">
            <text:p>140</text:p>
          </table:table-cell>
          <table:table-cell office:value-type="string">
            <text:p>2026-04-16T19:31:08.008Z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>
            <text:p>PDV-20260417-0001</text:p>
          </table:table-cell>
          <table:table-cell office:value-type="string">
            <text:p>MAQ_AMARELA_PIX_CEL</text:p>
          </table:table-cell>
          <table:table-cell office:value-type="float" office:value="150">
            <text:p>150</text:p>
          </table:table-cell>
          <table:table-cell office:value-type="string">
            <text:p>2026-04-17T20:16:44.453Z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string">
            <text:p>PDV-20260417-0002</text:p>
          </table:table-cell>
          <table:table-cell office:value-type="string">
            <text:p>MAQ_AMARELA_PIX_CEL</text:p>
          </table:table-cell>
          <table:table-cell office:value-type="float" office:value="500">
            <text:p>500</text:p>
          </table:table-cell>
          <table:table-cell office:value-type="string">
            <text:p>2026-04-17T21:37:12.854Z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>
            <text:p>PDV-20260418-0001</text:p>
          </table:table-cell>
          <table:table-cell office:value-type="string">
            <text:p>CC_PIX_PJ_MAQ_VERM</text:p>
          </table:table-cell>
          <table:table-cell office:value-type="float" office:value="30">
            <text:p>30</text:p>
          </table:table-cell>
          <table:table-cell office:value-type="string">
            <text:p>2026-04-18T15:01:07.691Z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string">
            <text:p>PDV-20260420-0001</text:p>
          </table:table-cell>
          <table:table-cell office:value-type="string">
            <text:p>MAQ_AMARELA_PIX_CEL</text:p>
          </table:table-cell>
          <table:table-cell office:value-type="float" office:value="140">
            <text:p>140</text:p>
          </table:table-cell>
          <table:table-cell office:value-type="string">
            <text:p>2026-04-20T14:42:01.827Z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>
            <text:p>PDV-20260420-0002</text:p>
          </table:table-cell>
          <table:table-cell office:value-type="string">
            <text:p>CAIXINHA_LOJA</text:p>
          </table:table-cell>
          <table:table-cell office:value-type="float" office:value="3">
            <text:p>3</text:p>
          </table:table-cell>
          <table:table-cell office:value-type="string">
            <text:p>2026-04-20T19:39:07.949Z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>
            <text:p>PDV-20260422-0001</text:p>
          </table:table-cell>
          <table:table-cell office:value-type="string">
            <text:p>CC_PIX_PJ_MAQ_VERM</text:p>
          </table:table-cell>
          <table:table-cell office:value-type="float" office:value="4.5">
            <text:p>4.5</text:p>
          </table:table-cell>
          <table:table-cell office:value-type="string">
            <text:p>2026-04-22T20:01:58.087Z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string">
            <text:p>PDV-20260422-0002</text:p>
          </table:table-cell>
          <table:table-cell office:value-type="string">
            <text:p>CC_PIX_PJ_MAQ_VERM</text:p>
          </table:table-cell>
          <table:table-cell office:value-type="float" office:value="25">
            <text:p>25</text:p>
          </table:table-cell>
          <table:table-cell office:value-type="string">
            <text:p>2026-04-22T20:18:30.483Z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>
            <text:p>PDV-20260423-0001</text:p>
          </table:table-cell>
          <table:table-cell office:value-type="string">
            <text:p>CC_PIX_PJ_MAQ_VERM</text:p>
          </table:table-cell>
          <table:table-cell office:value-type="float" office:value="15">
            <text:p>15</text:p>
          </table:table-cell>
          <table:table-cell office:value-type="string">
            <text:p>2026-04-23T16:42:23.264Z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39">
            <text:p>39</text:p>
          </table:table-cell>
          <table:table-cell office:value-type="string">
            <text:p>PDV-20260423-0002</text:p>
          </table:table-cell>
          <table:table-cell office:value-type="string">
            <text:p>R_COM_DENIO</text:p>
          </table:table-cell>
          <table:table-cell office:value-type="float" office:value="120">
            <text:p>120</text:p>
          </table:table-cell>
          <table:table-cell office:value-type="string">
            <text:p>2026-04-23T20:45:27.394Z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string">
            <text:p>PDV-20260423-0003</text:p>
          </table:table-cell>
          <table:table-cell office:value-type="string">
            <text:p>CC_PIX_PJ_MAQ_VERM</text:p>
          </table:table-cell>
          <table:table-cell office:value-type="float" office:value="390">
            <text:p>390</text:p>
          </table:table-cell>
          <table:table-cell office:value-type="string">
            <text:p>2026-04-23T22:55:44.640Z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string">
            <text:p>PDV-20260423-0004</text:p>
          </table:table-cell>
          <table:table-cell office:value-type="string">
            <text:p>CAIXINHA_LOJA</text:p>
          </table:table-cell>
          <table:table-cell office:value-type="float" office:value="420">
            <text:p>420</text:p>
          </table:table-cell>
          <table:table-cell office:value-type="string">
            <text:p>2026-04-23T20:32:40.604-03:0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>
            <text:p>PDV-20260424-0001</text:p>
          </table:table-cell>
          <table:table-cell office:value-type="string">
            <text:p>CAIXINHA_LOJA</text:p>
          </table:table-cell>
          <table:table-cell office:value-type="float" office:value="650">
            <text:p>650</text:p>
          </table:table-cell>
          <table:table-cell office:value-type="string">
            <text:p>2026-04-24T13:56:22.328-03:0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string">
            <text:p>PDV-20260427-0001</text:p>
          </table:table-cell>
          <table:table-cell office:value-type="string">
            <text:p>CC_PIX_PJ_MAQ_VERM</text:p>
          </table:table-cell>
          <table:table-cell office:value-type="float" office:value="70">
            <text:p>70</text:p>
          </table:table-cell>
          <table:table-cell office:value-type="string">
            <text:p>2026-04-27T16:24:55.713-03:0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string">
            <text:p>PDV-20260427-0002</text:p>
          </table:table-cell>
          <table:table-cell office:value-type="string">
            <text:p>R_COM_DENIO</text:p>
          </table:table-cell>
          <table:table-cell office:value-type="float" office:value="7">
            <text:p>7</text:p>
          </table:table-cell>
          <table:table-cell office:value-type="string">
            <text:p>2026-04-27T16:25:35.948-03:0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string">
            <text:p>PDV-20260427-0003</text:p>
          </table:table-cell>
          <table:table-cell office:value-type="string">
            <text:p>MAQ_AMARELA_PIX_CEL</text:p>
          </table:table-cell>
          <table:table-cell office:value-type="float" office:value="70">
            <text:p>70</text:p>
          </table:table-cell>
          <table:table-cell office:value-type="string">
            <text:p>2026-04-27T16:26:21.526-03:0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>
            <text:p>PDV-20260429-0001</text:p>
          </table:table-cell>
          <table:table-cell office:value-type="string">
            <text:p>MAQ_AMARELA_PIX_CEL</text:p>
          </table:table-cell>
          <table:table-cell office:value-type="float" office:value="7.5">
            <text:p>7.5</text:p>
          </table:table-cell>
          <table:table-cell office:value-type="string">
            <text:p>2026-04-29T16:03:02.333-03:0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string">
            <text:p>PDV-20260429-0002</text:p>
          </table:table-cell>
          <table:table-cell office:value-type="string">
            <text:p>MAQ_AMARELA_PIX_CEL</text:p>
          </table:table-cell>
          <table:table-cell office:value-type="float" office:value="100">
            <text:p>100</text:p>
          </table:table-cell>
          <table:table-cell office:value-type="string">
            <text:p>2026-04-29T19:32:18.665-03:0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string">
            <text:p>PDV-20260430-0001</text:p>
          </table:table-cell>
          <table:table-cell office:value-type="string">
            <text:p>MAQ_AMARELA_PIX_CEL</text:p>
          </table:table-cell>
          <table:table-cell office:value-type="float" office:value="400">
            <text:p>400</text:p>
          </table:table-cell>
          <table:table-cell office:value-type="string">
            <text:p>2026-04-30T12:57:45.992-03:0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49">
            <text:p>49</text:p>
          </table:table-cell>
          <table:table-cell office:value-type="string">
            <text:p>PDV-20260430-0002</text:p>
          </table:table-cell>
          <table:table-cell office:value-type="string">
            <text:p>MAQ_AMARELA_PIX_CEL</text:p>
          </table:table-cell>
          <table:table-cell office:value-type="float" office:value="200">
            <text:p>200</text:p>
          </table:table-cell>
          <table:table-cell office:value-type="string">
            <text:p>2026-04-30T14:20:48.944-03:00</text:p>
          </table:table-cell>
        </table:table-row>
      </table:table>
      <table:table table:name="Importacao Legada">
        <table:table-row>
          <table:table-cell office:value-type="string">
            <text:p>sem_dados</text:p>
          </table:table-cell>
        </table:table-row>
        <table:table-row>
          <table:table-cell office:value-type="string">
            <text:p>Nenhum registro encontrado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Brasil Express CRM</meta:generator>
    <meta:initial-creator>Daniel S.</meta:initial-creator>
    <meta:creation-date>2026-04-30T16:06:19.417-03:00</meta:creation-date>
  </office:meta>
</office:document-meta>
</file>